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3698.0">
            <text:p>3698</text:p>
          </table:table-cell>
          <table:table-cell office:value-type="float" office:value="-84554.0">
            <text:p>-84554</text:p>
          </table:table-cell>
          <table:table-cell office:value-type="float" office:value="4.0">
            <text:p>4</text:p>
          </table:table-cell>
          <table:table-cell office:value-type="float" office:value="340.0">
            <text:p>340</text:p>
          </table:table-cell>
          <table:table-cell office:value-type="float" office:value="505.0">
            <text:p>505</text:p>
          </table:table-cell>
          <table:table-cell office:value-type="float" office:value="6464.0">
            <text:p>6464</text:p>
          </table:table-cell>
          <table:table-cell office:value-type="float" office:value="3792.0">
            <text:p>3792</text:p>
          </table:table-cell>
          <table:table-cell office:value-type="float" office:value="-71607.0">
            <text:p>-71607</text:p>
          </table:table-cell>
          <table:table-cell office:value-type="float" office:value="-1815.0">
            <text:p>-1815</text:p>
          </table:table-cell>
          <table:table-cell office:value-type="float" office:value="-62526.0">
            <text:p>-62526</text:p>
          </table:table-cell>
          <table:table-cell office:value-type="float" office:value="-606.0">
            <text:p>-606</text:p>
          </table:table-cell>
          <table:table-cell office:value-type="float" office:value="-79138.0">
            <text:p>-79138</text:p>
          </table:table-cell>
          <table:table-cell office:value-type="float" office:value="77750.0">
            <text:p>77750</text:p>
          </table:table-cell>
          <table:table-cell office:value-type="float" office:value="213271.0">
            <text:p>213271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3343.0">
            <text:p>3343</text:p>
          </table:table-cell>
          <table:table-cell office:value-type="float" office:value="173085.0">
            <text:p>173085</text:p>
          </table:table-cell>
          <table:table-cell office:value-type="float" office:value="-158.0">
            <text:p>-158</text:p>
          </table:table-cell>
          <table:table-cell office:value-type="float" office:value="-8846.0">
            <text:p>-8846</text:p>
          </table:table-cell>
          <table:table-cell office:value-type="float" office:value="1521.0">
            <text:p>1521</text:p>
          </table:table-cell>
          <table:table-cell office:value-type="float" office:value="43125.0">
            <text:p>43125</text:p>
          </table:table-cell>
          <table:table-cell office:value-type="float" office:value="7135.0">
            <text:p>7135</text:p>
          </table:table-cell>
          <table:table-cell office:value-type="float" office:value="37481.0">
            <text:p>37481</text:p>
          </table:table-cell>
          <table:table-cell office:value-type="float" office:value="-1973.0">
            <text:p>-1973</text:p>
          </table:table-cell>
          <table:table-cell office:value-type="float" office:value="-155325.0">
            <text:p>-155325</text:p>
          </table:table-cell>
          <table:table-cell office:value-type="float" office:value="915.0">
            <text:p>915</text:p>
          </table:table-cell>
          <table:table-cell office:value-type="float" office:value="-43541.0">
            <text:p>-43541</text:p>
          </table:table-cell>
          <table:table-cell office:value-type="float" office:value="-207364.0">
            <text:p>-207364</text:p>
          </table:table-cell>
          <table:table-cell office:value-type="float" office:value="161385.0">
            <text:p>161385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4866.0">
            <text:p>-4866</text:p>
          </table:table-cell>
          <table:table-cell office:value-type="float" office:value="76088.0">
            <text:p>76088</text:p>
          </table:table-cell>
          <table:table-cell office:value-type="float" office:value="-220.0">
            <text:p>-220</text:p>
          </table:table-cell>
          <table:table-cell office:value-type="float" office:value="-14858.0">
            <text:p>-14858</text:p>
          </table:table-cell>
          <table:table-cell office:value-type="float" office:value="-5507.0">
            <text:p>-5507</text:p>
          </table:table-cell>
          <table:table-cell office:value-type="float" office:value="-2966.0">
            <text:p>-2966</text:p>
          </table:table-cell>
          <table:table-cell office:value-type="float" office:value="4162.0">
            <text:p>4162</text:p>
          </table:table-cell>
          <table:table-cell office:value-type="float" office:value="38612.0">
            <text:p>38612</text:p>
          </table:table-cell>
          <table:table-cell office:value-type="float" office:value="-1483.0">
            <text:p>-1483</text:p>
          </table:table-cell>
          <table:table-cell office:value-type="float" office:value="-110509.0">
            <text:p>-110509</text:p>
          </table:table-cell>
          <table:table-cell office:value-type="float" office:value="417.0">
            <text:p>417</text:p>
          </table:table-cell>
          <table:table-cell office:value-type="float" office:value="-76617.0">
            <text:p>-76617</text:p>
          </table:table-cell>
          <table:table-cell office:value-type="float" office:value="-58264.0">
            <text:p>-58264</text:p>
          </table:table-cell>
          <table:table-cell office:value-type="float" office:value="148514.0">
            <text:p>14851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427.0">
            <text:p>2427</text:p>
          </table:table-cell>
          <table:table-cell office:value-type="float" office:value="35900.0">
            <text:p>35900</text:p>
          </table:table-cell>
          <table:table-cell office:value-type="float" office:value="5.0">
            <text:p>5</text:p>
          </table:table-cell>
          <table:table-cell office:value-type="float" office:value="396.0">
            <text:p>396</text:p>
          </table:table-cell>
          <table:table-cell office:value-type="float" office:value="-33.0">
            <text:p>-33</text:p>
          </table:table-cell>
          <table:table-cell office:value-type="float" office:value="-279.0">
            <text:p>-279</text:p>
          </table:table-cell>
          <table:table-cell office:value-type="float" office:value="9843.0">
            <text:p>9843</text:p>
          </table:table-cell>
          <table:table-cell office:value-type="float" office:value="361526.0">
            <text:p>361526</text:p>
          </table:table-cell>
          <table:table-cell office:value-type="float" office:value="129.0">
            <text:p>129</text:p>
          </table:table-cell>
          <table:table-cell office:value-type="float" office:value="4487.0">
            <text:p>4487</text:p>
          </table:table-cell>
          <table:table-cell office:value-type="float" office:value="3308.0">
            <text:p>3308</text:p>
          </table:table-cell>
          <table:table-cell office:value-type="float" office:value="167267.0">
            <text:p>167267</text:p>
          </table:table-cell>
          <table:table-cell office:value-type="float" office:value="-36017.0">
            <text:p>-36017</text:p>
          </table:table-cell>
          <table:table-cell office:value-type="float" office:value="-533280.0">
            <text:p>-533280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4893.0">
            <text:p>-4893</text:p>
          </table:table-cell>
          <table:table-cell office:value-type="float" office:value="-81727.0">
            <text:p>-817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62.0">
            <text:p>3462</text:p>
          </table:table-cell>
          <table:table-cell office:value-type="float" office:value="-3686.0">
            <text:p>-3686</text:p>
          </table:table-cell>
          <table:table-cell office:value-type="float" office:value="4950.0">
            <text:p>4950</text:p>
          </table:table-cell>
          <table:table-cell office:value-type="float" office:value="115726.0">
            <text:p>115726</text:p>
          </table:table-cell>
          <table:table-cell office:value-type="float" office:value="129.0">
            <text:p>129</text:p>
          </table:table-cell>
          <table:table-cell office:value-type="float" office:value="762.0">
            <text:p>762</text:p>
          </table:table-cell>
          <table:table-cell office:value-type="float" office:value="6770.0">
            <text:p>6770</text:p>
          </table:table-cell>
          <table:table-cell office:value-type="float" office:value="107148.0">
            <text:p>107148</text:p>
          </table:table-cell>
          <table:table-cell office:value-type="float" office:value="85413.0">
            <text:p>85413</text:p>
          </table:table-cell>
          <table:table-cell office:value-type="float" office:value="-223636.0">
            <text:p>-223636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19950.0">
            <text:p>-19950</text:p>
          </table:table-cell>
          <table:table-cell office:value-type="float" office:value="-25633.0">
            <text:p>-256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9.0">
            <text:p>299</text:p>
          </table:table-cell>
          <table:table-cell office:value-type="float" office:value="-21516.0">
            <text:p>-21516</text:p>
          </table:table-cell>
          <table:table-cell office:value-type="float" office:value="4069.0">
            <text:p>4069</text:p>
          </table:table-cell>
          <table:table-cell office:value-type="float" office:value="84108.0">
            <text:p>84108</text:p>
          </table:table-cell>
          <table:table-cell office:value-type="float" office:value="9.0">
            <text:p>9</text:p>
          </table:table-cell>
          <table:table-cell office:value-type="float" office:value="546.0">
            <text:p>546</text:p>
          </table:table-cell>
          <table:table-cell office:value-type="float" office:value="2735.0">
            <text:p>2735</text:p>
          </table:table-cell>
          <table:table-cell office:value-type="float" office:value="89409.0">
            <text:p>89409</text:p>
          </table:table-cell>
          <table:table-cell office:value-type="float" office:value="47149.0">
            <text:p>47149</text:p>
          </table:table-cell>
          <table:table-cell office:value-type="float" office:value="-174063.0">
            <text:p>-17406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974.0">
            <text:p>2974</text:p>
          </table:table-cell>
          <table:table-cell office:value-type="float" office:value="25409213.0">
            <text:p>25409213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1203.0">
            <text:p>1203</text:p>
          </table:table-cell>
          <table:table-cell office:value-type="float" office:value="10717869.0">
            <text:p>10717869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1139.0">
            <text:p>1139</text:p>
          </table:table-cell>
          <table:table-cell office:value-type="float" office:value="10208144.0">
            <text:p>1020814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