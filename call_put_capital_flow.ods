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3443.0">
            <text:p>-13443</text:p>
          </table:table-cell>
          <table:table-cell office:value-type="float" office:value="14575.0">
            <text:p>145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239.0">
            <text:p>-1239</text:p>
          </table:table-cell>
          <table:table-cell office:value-type="float" office:value="-51632.0">
            <text:p>-51632</text:p>
          </table:table-cell>
          <table:table-cell office:value-type="float" office:value="1796.0">
            <text:p>1796</text:p>
          </table:table-cell>
          <table:table-cell office:value-type="float" office:value="-164249.0">
            <text:p>-164249</text:p>
          </table:table-cell>
          <table:table-cell office:value-type="float" office:value="-429.0">
            <text:p>-429</text:p>
          </table:table-cell>
          <table:table-cell office:value-type="float" office:value="-149403.0">
            <text:p>-149403</text:p>
          </table:table-cell>
          <table:table-cell office:value-type="float" office:value="1770.0">
            <text:p>1770</text:p>
          </table:table-cell>
          <table:table-cell office:value-type="float" office:value="142891.0">
            <text:p>142891</text:p>
          </table:table-cell>
          <table:table-cell office:value-type="float" office:value="37057.0">
            <text:p>37057</text:p>
          </table:table-cell>
          <table:table-cell office:value-type="float" office:value="170761.0">
            <text:p>170761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3101.0">
            <text:p>3101</text:p>
          </table:table-cell>
          <table:table-cell office:value-type="float" office:value="-7133.0">
            <text:p>-7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90.0">
            <text:p>1490</text:p>
          </table:table-cell>
          <table:table-cell office:value-type="float" office:value="-4194.0">
            <text:p>-4194</text:p>
          </table:table-cell>
          <table:table-cell office:value-type="float" office:value="4897.0">
            <text:p>4897</text:p>
          </table:table-cell>
          <table:table-cell office:value-type="float" office:value="-165767.0">
            <text:p>-165767</text:p>
          </table:table-cell>
          <table:table-cell office:value-type="float" office:value="-429.0">
            <text:p>-429</text:p>
          </table:table-cell>
          <table:table-cell office:value-type="float" office:value="-148967.0">
            <text:p>-148967</text:p>
          </table:table-cell>
          <table:table-cell office:value-type="float" office:value="3260.0">
            <text:p>3260</text:p>
          </table:table-cell>
          <table:table-cell office:value-type="float" office:value="123091.0">
            <text:p>123091</text:p>
          </table:table-cell>
          <table:table-cell office:value-type="float" office:value="11327.0">
            <text:p>11327</text:p>
          </table:table-cell>
          <table:table-cell office:value-type="float" office:value="191643.0">
            <text:p>191643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1800.0">
            <text:p>1800</text:p>
          </table:table-cell>
          <table:table-cell office:value-type="float" office:value="46409.0">
            <text:p>4640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8.0">
            <text:p>-358</text:p>
          </table:table-cell>
          <table:table-cell office:value-type="float" office:value="-25817.0">
            <text:p>-25817</text:p>
          </table:table-cell>
          <table:table-cell office:value-type="float" office:value="6697.0">
            <text:p>6697</text:p>
          </table:table-cell>
          <table:table-cell office:value-type="float" office:value="-128655.0">
            <text:p>-128655</text:p>
          </table:table-cell>
          <table:table-cell office:value-type="float" office:value="-429.0">
            <text:p>-429</text:p>
          </table:table-cell>
          <table:table-cell office:value-type="float" office:value="-144128.0">
            <text:p>-144128</text:p>
          </table:table-cell>
          <table:table-cell office:value-type="float" office:value="2902.0">
            <text:p>2902</text:p>
          </table:table-cell>
          <table:table-cell office:value-type="float" office:value="103481.0">
            <text:p>103481</text:p>
          </table:table-cell>
          <table:table-cell office:value-type="float" office:value="-20592.0">
            <text:p>-20592</text:p>
          </table:table-cell>
          <table:table-cell office:value-type="float" office:value="169302.0">
            <text:p>16930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8899.0">
            <text:p>-8899</text:p>
          </table:table-cell>
          <table:table-cell office:value-type="float" office:value="-4316.0">
            <text:p>-43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71.0">
            <text:p>1271</text:p>
          </table:table-cell>
          <table:table-cell office:value-type="float" office:value="-7610.0">
            <text:p>-7610</text:p>
          </table:table-cell>
          <table:table-cell office:value-type="float" office:value="9783.0">
            <text:p>9783</text:p>
          </table:table-cell>
          <table:table-cell office:value-type="float" office:value="-124534.0">
            <text:p>-124534</text:p>
          </table:table-cell>
          <table:table-cell office:value-type="float" office:value="-429.0">
            <text:p>-429</text:p>
          </table:table-cell>
          <table:table-cell office:value-type="float" office:value="-138449.0">
            <text:p>-138449</text:p>
          </table:table-cell>
          <table:table-cell office:value-type="float" office:value="928.0">
            <text:p>928</text:p>
          </table:table-cell>
          <table:table-cell office:value-type="float" office:value="109006.0">
            <text:p>109006</text:p>
          </table:table-cell>
          <table:table-cell office:value-type="float" office:value="11926.0">
            <text:p>11926</text:p>
          </table:table-cell>
          <table:table-cell office:value-type="float" office:value="153977.0">
            <text:p>153977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57.0">
            <text:p>-57</text:p>
          </table:table-cell>
          <table:table-cell office:value-type="float" office:value="-28580.0">
            <text:p>-2858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98.0">
            <text:p>598</text:p>
          </table:table-cell>
          <table:table-cell office:value-type="float" office:value="8789.0">
            <text:p>8789</text:p>
          </table:table-cell>
          <table:table-cell office:value-type="float" office:value="9726.0">
            <text:p>9726</text:p>
          </table:table-cell>
          <table:table-cell office:value-type="float" office:value="-154228.0">
            <text:p>-154228</text:p>
          </table:table-cell>
          <table:table-cell office:value-type="float" office:value="-429.0">
            <text:p>-429</text:p>
          </table:table-cell>
          <table:table-cell office:value-type="float" office:value="-141936.0">
            <text:p>-141936</text:p>
          </table:table-cell>
          <table:table-cell office:value-type="float" office:value="1526.0">
            <text:p>1526</text:p>
          </table:table-cell>
          <table:table-cell office:value-type="float" office:value="110157.0">
            <text:p>110157</text:p>
          </table:table-cell>
          <table:table-cell office:value-type="float" office:value="19791.0">
            <text:p>19791</text:p>
          </table:table-cell>
          <table:table-cell office:value-type="float" office:value="186007.0">
            <text:p>186007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26625.0">
            <text:p>-26625</text:p>
          </table:table-cell>
          <table:table-cell office:value-type="float" office:value="23945.0">
            <text:p>239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76.0">
            <text:p>-2176</text:p>
          </table:table-cell>
          <table:table-cell office:value-type="float" office:value="-33843.0">
            <text:p>-33843</text:p>
          </table:table-cell>
          <table:table-cell office:value-type="float" office:value="10007.0">
            <text:p>10007</text:p>
          </table:table-cell>
          <table:table-cell office:value-type="float" office:value="-150038.0">
            <text:p>-150038</text:p>
          </table:table-cell>
          <table:table-cell office:value-type="float" office:value="-429.0">
            <text:p>-429</text:p>
          </table:table-cell>
          <table:table-cell office:value-type="float" office:value="-128945.0">
            <text:p>-128945</text:p>
          </table:table-cell>
          <table:table-cell office:value-type="float" office:value="2806.0">
            <text:p>2806</text:p>
          </table:table-cell>
          <table:table-cell office:value-type="float" office:value="107011.0">
            <text:p>107011</text:p>
          </table:table-cell>
          <table:table-cell office:value-type="float" office:value="9898.0">
            <text:p>9898</text:p>
          </table:table-cell>
          <table:table-cell office:value-type="float" office:value="171972.0">
            <text:p>17197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5610.0">
            <text:p>5610</text:p>
          </table:table-cell>
          <table:table-cell office:value-type="float" office:value="-46910.0">
            <text:p>-4691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20.0">
            <text:p>1520</text:p>
          </table:table-cell>
          <table:table-cell office:value-type="float" office:value="6356.0">
            <text:p>6356</text:p>
          </table:table-cell>
          <table:table-cell office:value-type="float" office:value="15617.0">
            <text:p>15617</text:p>
          </table:table-cell>
          <table:table-cell office:value-type="float" office:value="-206189.0">
            <text:p>-206189</text:p>
          </table:table-cell>
          <table:table-cell office:value-type="float" office:value="-429.0">
            <text:p>-429</text:p>
          </table:table-cell>
          <table:table-cell office:value-type="float" office:value="-124228.0">
            <text:p>-124228</text:p>
          </table:table-cell>
          <table:table-cell office:value-type="float" office:value="4326.0">
            <text:p>4326</text:p>
          </table:table-cell>
          <table:table-cell office:value-type="float" office:value="111956.0">
            <text:p>111956</text:p>
          </table:table-cell>
          <table:table-cell office:value-type="float" office:value="40554.0">
            <text:p>40554</text:p>
          </table:table-cell>
          <table:table-cell office:value-type="float" office:value="218461.0">
            <text:p>218461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1449.0">
            <text:p>-1449</text:p>
          </table:table-cell>
          <table:table-cell office:value-type="float" office:value="-24859.0">
            <text:p>-24859</text:p>
          </table:table-cell>
          <table:table-cell office:value-type="float" office:value="-100.0">
            <text:p>-100</text:p>
          </table:table-cell>
          <table:table-cell office:value-type="float" office:value="-740.0">
            <text:p>-740</text:p>
          </table:table-cell>
          <table:table-cell office:value-type="float" office:value="71.0">
            <text:p>71</text:p>
          </table:table-cell>
          <table:table-cell office:value-type="float" office:value="-11588.0">
            <text:p>-11588</text:p>
          </table:table-cell>
          <table:table-cell office:value-type="float" office:value="14168.0">
            <text:p>14168</text:p>
          </table:table-cell>
          <table:table-cell office:value-type="float" office:value="-226463.0">
            <text:p>-226463</text:p>
          </table:table-cell>
          <table:table-cell office:value-type="float" office:value="-529.0">
            <text:p>-529</text:p>
          </table:table-cell>
          <table:table-cell office:value-type="float" office:value="-113067.0">
            <text:p>-113067</text:p>
          </table:table-cell>
          <table:table-cell office:value-type="float" office:value="4397.0">
            <text:p>4397</text:p>
          </table:table-cell>
          <table:table-cell office:value-type="float" office:value="116104.0">
            <text:p>116104</text:p>
          </table:table-cell>
          <table:table-cell office:value-type="float" office:value="37187.0">
            <text:p>37187</text:p>
          </table:table-cell>
          <table:table-cell office:value-type="float" office:value="223426.0">
            <text:p>22342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8500.0">
            <text:p>-18500</text:p>
          </table:table-cell>
          <table:table-cell office:value-type="float" office:value="48891.0">
            <text:p>48891</text:p>
          </table:table-cell>
          <table:table-cell office:value-type="float" office:value="7.0">
            <text:p>7</text:p>
          </table:table-cell>
          <table:table-cell office:value-type="float" office:value="468.0">
            <text:p>468</text:p>
          </table:table-cell>
          <table:table-cell office:value-type="float" office:value="-2750.0">
            <text:p>-2750</text:p>
          </table:table-cell>
          <table:table-cell office:value-type="float" office:value="-71238.0">
            <text:p>-71238</text:p>
          </table:table-cell>
          <table:table-cell office:value-type="float" office:value="-679.0">
            <text:p>-679</text:p>
          </table:table-cell>
          <table:table-cell office:value-type="float" office:value="-391441.0">
            <text:p>-391441</text:p>
          </table:table-cell>
          <table:table-cell office:value-type="float" office:value="-10.0">
            <text:p>-10</text:p>
          </table:table-cell>
          <table:table-cell office:value-type="float" office:value="-945.0">
            <text:p>-945</text:p>
          </table:table-cell>
          <table:table-cell office:value-type="float" office:value="1472.0">
            <text:p>1472</text:p>
          </table:table-cell>
          <table:table-cell office:value-type="float" office:value="551059.0">
            <text:p>551059</text:p>
          </table:table-cell>
          <table:table-cell office:value-type="float" office:value="21879.0">
            <text:p>21879</text:p>
          </table:table-cell>
          <table:table-cell office:value-type="float" office:value="-158673.0">
            <text:p>-158673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5163.0">
            <text:p>5163</text:p>
          </table:table-cell>
          <table:table-cell office:value-type="float" office:value="-135887.0">
            <text:p>-135887</text:p>
          </table:table-cell>
          <table:table-cell office:value-type="float" office:value="-340.0">
            <text:p>-340</text:p>
          </table:table-cell>
          <table:table-cell office:value-type="float" office:value="-25514.0">
            <text:p>-25514</text:p>
          </table:table-cell>
          <table:table-cell office:value-type="float" office:value="737.0">
            <text:p>737</text:p>
          </table:table-cell>
          <table:table-cell office:value-type="float" office:value="10315.0">
            <text:p>10315</text:p>
          </table:table-cell>
          <table:table-cell office:value-type="float" office:value="4484.0">
            <text:p>4484</text:p>
          </table:table-cell>
          <table:table-cell office:value-type="float" office:value="-562197.0">
            <text:p>-562197</text:p>
          </table:table-cell>
          <table:table-cell office:value-type="float" office:value="-350.0">
            <text:p>-350</text:p>
          </table:table-cell>
          <table:table-cell office:value-type="float" office:value="-27733.0">
            <text:p>-27733</text:p>
          </table:table-cell>
          <table:table-cell office:value-type="float" office:value="2209.0">
            <text:p>2209</text:p>
          </table:table-cell>
          <table:table-cell office:value-type="float" office:value="619157.0">
            <text:p>619157</text:p>
          </table:table-cell>
          <table:table-cell office:value-type="float" office:value="151086.0">
            <text:p>151086</text:p>
          </table:table-cell>
          <table:table-cell office:value-type="float" office:value="-29227.0">
            <text:p>-29227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3226.0">
            <text:p>-3226</text:p>
          </table:table-cell>
          <table:table-cell office:value-type="float" office:value="50760.0">
            <text:p>5076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1.0">
            <text:p>-101</text:p>
          </table:table-cell>
          <table:table-cell office:value-type="float" office:value="-9270.0">
            <text:p>-9270</text:p>
          </table:table-cell>
          <table:table-cell office:value-type="float" office:value="-319.0">
            <text:p>-319</text:p>
          </table:table-cell>
          <table:table-cell office:value-type="float" office:value="-692176.0">
            <text:p>-692176</text:p>
          </table:table-cell>
          <table:table-cell office:value-type="float" office:value="-350.0">
            <text:p>-350</text:p>
          </table:table-cell>
          <table:table-cell office:value-type="float" office:value="-37431.0">
            <text:p>-37431</text:p>
          </table:table-cell>
          <table:table-cell office:value-type="float" office:value="1901.0">
            <text:p>1901</text:p>
          </table:table-cell>
          <table:table-cell office:value-type="float" office:value="653330.0">
            <text:p>653330</text:p>
          </table:table-cell>
          <table:table-cell office:value-type="float" office:value="-41490.0">
            <text:p>-41490</text:p>
          </table:table-cell>
          <table:table-cell office:value-type="float" office:value="76277.0">
            <text:p>7627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2413.0">
            <text:p>2413</text:p>
          </table:table-cell>
          <table:table-cell office:value-type="float" office:value="-40316.0">
            <text:p>-40316</text:p>
          </table:table-cell>
          <table:table-cell office:value-type="float" office:value="-45.0">
            <text:p>-45</text:p>
          </table:table-cell>
          <table:table-cell office:value-type="float" office:value="-2914.0">
            <text:p>-2914</text:p>
          </table:table-cell>
          <table:table-cell office:value-type="float" office:value="1323.0">
            <text:p>1323</text:p>
          </table:table-cell>
          <table:table-cell office:value-type="float" office:value="15589.0">
            <text:p>15589</text:p>
          </table:table-cell>
          <table:table-cell office:value-type="float" office:value="2094.0">
            <text:p>2094</text:p>
          </table:table-cell>
          <table:table-cell office:value-type="float" office:value="-864524.0">
            <text:p>-864524</text:p>
          </table:table-cell>
          <table:table-cell office:value-type="float" office:value="-395.0">
            <text:p>-395</text:p>
          </table:table-cell>
          <table:table-cell office:value-type="float" office:value="-58450.0">
            <text:p>-58450</text:p>
          </table:table-cell>
          <table:table-cell office:value-type="float" office:value="3224.0">
            <text:p>3224</text:p>
          </table:table-cell>
          <table:table-cell office:value-type="float" office:value="773308.0">
            <text:p>773308</text:p>
          </table:table-cell>
          <table:table-cell office:value-type="float" office:value="27641.0">
            <text:p>27641</text:p>
          </table:table-cell>
          <table:table-cell office:value-type="float" office:value="149666.0">
            <text:p>14966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96.0">
            <text:p>-96</text:p>
          </table:table-cell>
          <table:table-cell office:value-type="float" office:value="23180.0">
            <text:p>23180</text:p>
          </table:table-cell>
          <table:table-cell office:value-type="float" office:value="-120.0">
            <text:p>-120</text:p>
          </table:table-cell>
          <table:table-cell office:value-type="float" office:value="-527.0">
            <text:p>-527</text:p>
          </table:table-cell>
          <table:table-cell office:value-type="float" office:value="97.0">
            <text:p>97</text:p>
          </table:table-cell>
          <table:table-cell office:value-type="float" office:value="-61054.0">
            <text:p>-61054</text:p>
          </table:table-cell>
          <table:table-cell office:value-type="float" office:value="1998.0">
            <text:p>1998</text:p>
          </table:table-cell>
          <table:table-cell office:value-type="float" office:value="-840645.0">
            <text:p>-840645</text:p>
          </table:table-cell>
          <table:table-cell office:value-type="float" office:value="-515.0">
            <text:p>-515</text:p>
          </table:table-cell>
          <table:table-cell office:value-type="float" office:value="-58583.0">
            <text:p>-58583</text:p>
          </table:table-cell>
          <table:table-cell office:value-type="float" office:value="3321.0">
            <text:p>3321</text:p>
          </table:table-cell>
          <table:table-cell office:value-type="float" office:value="709246.0">
            <text:p>709246</text:p>
          </table:table-cell>
          <table:table-cell office:value-type="float" office:value="38401.0">
            <text:p>38401</text:p>
          </table:table-cell>
          <table:table-cell office:value-type="float" office:value="189982.0">
            <text:p>189982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8100.0">
            <text:p>-8100</text:p>
          </table:table-cell>
          <table:table-cell office:value-type="float" office:value="185351.0">
            <text:p>185351</text:p>
          </table:table-cell>
          <table:table-cell office:value-type="float" office:value="-1.0">
            <text:p>-1</text:p>
          </table:table-cell>
          <table:table-cell office:value-type="float" office:value="-219.0">
            <text:p>-219</text:p>
          </table:table-cell>
          <table:table-cell office:value-type="float" office:value="-3568.0">
            <text:p>-3568</text:p>
          </table:table-cell>
          <table:table-cell office:value-type="float" office:value="-92531.0">
            <text:p>-92531</text:p>
          </table:table-cell>
          <table:table-cell office:value-type="float" office:value="-176.0">
            <text:p>-176</text:p>
          </table:table-cell>
          <table:table-cell office:value-type="float" office:value="-845531.0">
            <text:p>-845531</text:p>
          </table:table-cell>
          <table:table-cell office:value-type="float" office:value="-396.0">
            <text:p>-396</text:p>
          </table:table-cell>
          <table:table-cell office:value-type="float" office:value="-73583.0">
            <text:p>-73583</text:p>
          </table:table-cell>
          <table:table-cell office:value-type="float" office:value="1213.0">
            <text:p>1213</text:p>
          </table:table-cell>
          <table:table-cell office:value-type="float" office:value="589325.0">
            <text:p>589325</text:p>
          </table:table-cell>
          <table:table-cell office:value-type="float" office:value="-92601.0">
            <text:p>-92601</text:p>
          </table:table-cell>
          <table:table-cell office:value-type="float" office:value="329789.0">
            <text:p>3297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4778.0">
            <text:p>-4778</text:p>
          </table:table-cell>
          <table:table-cell office:value-type="float" office:value="-90393.0">
            <text:p>-90393</text:p>
          </table:table-cell>
          <table:table-cell office:value-type="float" office:value="-100.0">
            <text:p>-100</text:p>
          </table:table-cell>
          <table:table-cell office:value-type="float" office:value="-1794.0">
            <text:p>-1794</text:p>
          </table:table-cell>
          <table:table-cell office:value-type="float" office:value="341.0">
            <text:p>341</text:p>
          </table:table-cell>
          <table:table-cell office:value-type="float" office:value="-73717.0">
            <text:p>-73717</text:p>
          </table:table-cell>
          <table:table-cell office:value-type="float" office:value="-4954.0">
            <text:p>-4954</text:p>
          </table:table-cell>
          <table:table-cell office:value-type="float" office:value="-794031.0">
            <text:p>-794031</text:p>
          </table:table-cell>
          <table:table-cell office:value-type="float" office:value="-496.0">
            <text:p>-496</text:p>
          </table:table-cell>
          <table:table-cell office:value-type="float" office:value="-60185.0">
            <text:p>-60185</text:p>
          </table:table-cell>
          <table:table-cell office:value-type="float" office:value="1554.0">
            <text:p>1554</text:p>
          </table:table-cell>
          <table:table-cell office:value-type="float" office:value="484160.0">
            <text:p>484160</text:p>
          </table:table-cell>
          <table:table-cell office:value-type="float" office:value="165904.0">
            <text:p>165904</text:p>
          </table:table-cell>
          <table:table-cell office:value-type="float" office:value="370056.0">
            <text:p>37005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3963.0">
            <text:p>-3963</text:p>
          </table:table-cell>
          <table:table-cell office:value-type="float" office:value="39686.0">
            <text:p>3968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9.0">
            <text:p>1399</text:p>
          </table:table-cell>
          <table:table-cell office:value-type="float" office:value="34697.0">
            <text:p>34697</text:p>
          </table:table-cell>
          <table:table-cell office:value-type="float" office:value="-3888.0">
            <text:p>-3888</text:p>
          </table:table-cell>
          <table:table-cell office:value-type="float" office:value="-953601.0">
            <text:p>-953601</text:p>
          </table:table-cell>
          <table:table-cell office:value-type="float" office:value="-406.0">
            <text:p>-406</text:p>
          </table:table-cell>
          <table:table-cell office:value-type="float" office:value="-82826.0">
            <text:p>-82826</text:p>
          </table:table-cell>
          <table:table-cell office:value-type="float" office:value="2372.0">
            <text:p>2372</text:p>
          </table:table-cell>
          <table:table-cell office:value-type="float" office:value="569039.0">
            <text:p>569039</text:p>
          </table:table-cell>
          <table:table-cell office:value-type="float" office:value="-74383.0">
            <text:p>-74383</text:p>
          </table:table-cell>
          <table:table-cell office:value-type="float" office:value="467388.0">
            <text:p>467388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6948.0">
            <text:p>6948</text:p>
          </table:table-cell>
          <table:table-cell office:value-type="float" office:value="32917.0">
            <text:p>329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24.0">
            <text:p>1224</text:p>
          </table:table-cell>
          <table:table-cell office:value-type="float" office:value="11705.0">
            <text:p>11705</text:p>
          </table:table-cell>
          <table:table-cell office:value-type="float" office:value="3060.0">
            <text:p>3060</text:p>
          </table:table-cell>
          <table:table-cell office:value-type="float" office:value="-994899.0">
            <text:p>-994899</text:p>
          </table:table-cell>
          <table:table-cell office:value-type="float" office:value="-406.0">
            <text:p>-406</text:p>
          </table:table-cell>
          <table:table-cell office:value-type="float" office:value="-95608.0">
            <text:p>-95608</text:p>
          </table:table-cell>
          <table:table-cell office:value-type="float" office:value="3596.0">
            <text:p>3596</text:p>
          </table:table-cell>
          <table:table-cell office:value-type="float" office:value="618685.0">
            <text:p>618685</text:p>
          </table:table-cell>
          <table:table-cell office:value-type="float" office:value="-44622.0">
            <text:p>-44622</text:p>
          </table:table-cell>
          <table:table-cell office:value-type="float" office:value="471822.0">
            <text:p>471822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270.0">
            <text:p>2270</text:p>
          </table:table-cell>
          <table:table-cell office:value-type="float" office:value="-76661.0">
            <text:p>-76661</text:p>
          </table:table-cell>
          <table:table-cell office:value-type="float" office:value="-85.0">
            <text:p>-85</text:p>
          </table:table-cell>
          <table:table-cell office:value-type="float" office:value="-729.0">
            <text:p>-729</text:p>
          </table:table-cell>
          <table:table-cell office:value-type="float" office:value="4.0">
            <text:p>4</text:p>
          </table:table-cell>
          <table:table-cell office:value-type="float" office:value="-17490.0">
            <text:p>-17490</text:p>
          </table:table-cell>
          <table:table-cell office:value-type="float" office:value="5330.0">
            <text:p>5330</text:p>
          </table:table-cell>
          <table:table-cell office:value-type="float" office:value="-1079202.0">
            <text:p>-1079202</text:p>
          </table:table-cell>
          <table:table-cell office:value-type="float" office:value="-491.0">
            <text:p>-491</text:p>
          </table:table-cell>
          <table:table-cell office:value-type="float" office:value="-96657.0">
            <text:p>-96657</text:p>
          </table:table-cell>
          <table:table-cell office:value-type="float" office:value="3600.0">
            <text:p>3600</text:p>
          </table:table-cell>
          <table:table-cell office:value-type="float" office:value="597293.0">
            <text:p>597293</text:p>
          </table:table-cell>
          <table:table-cell office:value-type="float" office:value="94880.0">
            <text:p>94880</text:p>
          </table:table-cell>
          <table:table-cell office:value-type="float" office:value="578566.0">
            <text:p>578566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6962.0">
            <text:p>-6962</text:p>
          </table:table-cell>
          <table:table-cell office:value-type="float" office:value="120528.0">
            <text:p>120528</text:p>
          </table:table-cell>
          <table:table-cell office:value-type="float" office:value="-11.0">
            <text:p>-11</text:p>
          </table:table-cell>
          <table:table-cell office:value-type="float" office:value="-837.0">
            <text:p>-837</text:p>
          </table:table-cell>
          <table:table-cell office:value-type="float" office:value="-1309.0">
            <text:p>-1309</text:p>
          </table:table-cell>
          <table:table-cell office:value-type="float" office:value="-2848.0">
            <text:p>-2848</text:p>
          </table:table-cell>
          <table:table-cell office:value-type="float" office:value="-307.0">
            <text:p>-307</text:p>
          </table:table-cell>
          <table:table-cell office:value-type="float" office:value="-1056029.0">
            <text:p>-1056029</text:p>
          </table:table-cell>
          <table:table-cell office:value-type="float" office:value="-417.0">
            <text:p>-417</text:p>
          </table:table-cell>
          <table:table-cell office:value-type="float" office:value="-110180.0">
            <text:p>-110180</text:p>
          </table:table-cell>
          <table:table-cell office:value-type="float" office:value="2667.0">
            <text:p>2667</text:p>
          </table:table-cell>
          <table:table-cell office:value-type="float" office:value="636568.0">
            <text:p>636568</text:p>
          </table:table-cell>
          <table:table-cell office:value-type="float" office:value="-116843.0">
            <text:p>-116843</text:p>
          </table:table-cell>
          <table:table-cell office:value-type="float" office:value="529641.0">
            <text:p>529641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837.0">
            <text:p>-837</text:p>
          </table:table-cell>
          <table:table-cell office:value-type="float" office:value="-120417.0">
            <text:p>-1204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06.0">
            <text:p>-706</text:p>
          </table:table-cell>
          <table:table-cell office:value-type="float" office:value="-36548.0">
            <text:p>-36548</text:p>
          </table:table-cell>
          <table:table-cell office:value-type="float" office:value="-1144.0">
            <text:p>-1144</text:p>
          </table:table-cell>
          <table:table-cell office:value-type="float" office:value="-1087032.0">
            <text:p>-1087032</text:p>
          </table:table-cell>
          <table:table-cell office:value-type="float" office:value="-417.0">
            <text:p>-417</text:p>
          </table:table-cell>
          <table:table-cell office:value-type="float" office:value="-99324.0">
            <text:p>-99324</text:p>
          </table:table-cell>
          <table:table-cell office:value-type="float" office:value="1961.0">
            <text:p>1961</text:p>
          </table:table-cell>
          <table:table-cell office:value-type="float" office:value="558309.0">
            <text:p>558309</text:p>
          </table:table-cell>
          <table:table-cell office:value-type="float" office:value="156965.0">
            <text:p>156965</text:p>
          </table:table-cell>
          <table:table-cell office:value-type="float" office:value="628047.0">
            <text:p>628047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16851.0">
            <text:p>-16851</text:p>
          </table:table-cell>
          <table:table-cell office:value-type="float" office:value="17263.0">
            <text:p>17263</text:p>
          </table:table-cell>
          <table:table-cell office:value-type="float" office:value="-1.0">
            <text:p>-1</text:p>
          </table:table-cell>
          <table:table-cell office:value-type="float" office:value="-42.0">
            <text:p>-42</text:p>
          </table:table-cell>
          <table:table-cell office:value-type="float" office:value="-2130.0">
            <text:p>-2130</text:p>
          </table:table-cell>
          <table:table-cell office:value-type="float" office:value="-17028.0">
            <text:p>-17028</text:p>
          </table:table-cell>
          <table:table-cell office:value-type="float" office:value="-1096.0">
            <text:p>-1096</text:p>
          </table:table-cell>
          <table:table-cell office:value-type="float" office:value="-852919.0">
            <text:p>-852919</text:p>
          </table:table-cell>
          <table:table-cell office:value-type="float" office:value="-418.0">
            <text:p>-418</text:p>
          </table:table-cell>
          <table:table-cell office:value-type="float" office:value="-78252.0">
            <text:p>-78252</text:p>
          </table:table-cell>
          <table:table-cell office:value-type="float" office:value="2414.0">
            <text:p>2414</text:p>
          </table:table-cell>
          <table:table-cell office:value-type="float" office:value="507563.0">
            <text:p>507563</text:p>
          </table:table-cell>
          <table:table-cell office:value-type="float" office:value="-193.0">
            <text:p>-193</text:p>
          </table:table-cell>
          <table:table-cell office:value-type="float" office:value="423608.0">
            <text:p>423608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2323.0">
            <text:p>2323</text:p>
          </table:table-cell>
          <table:table-cell office:value-type="float" office:value="-64329.0">
            <text:p>-64329</text:p>
          </table:table-cell>
          <table:table-cell office:value-type="float" office:value="-200.0">
            <text:p>-200</text:p>
          </table:table-cell>
          <table:table-cell office:value-type="float" office:value="-11341.0">
            <text:p>-11341</text:p>
          </table:table-cell>
          <table:table-cell office:value-type="float" office:value="98.0">
            <text:p>98</text:p>
          </table:table-cell>
          <table:table-cell office:value-type="float" office:value="6589.0">
            <text:p>6589</text:p>
          </table:table-cell>
          <table:table-cell office:value-type="float" office:value="1227.0">
            <text:p>1227</text:p>
          </table:table-cell>
          <table:table-cell office:value-type="float" office:value="-678124.0">
            <text:p>-678124</text:p>
          </table:table-cell>
          <table:table-cell office:value-type="float" office:value="-618.0">
            <text:p>-618</text:p>
          </table:table-cell>
          <table:table-cell office:value-type="float" office:value="-55696.0">
            <text:p>-55696</text:p>
          </table:table-cell>
          <table:table-cell office:value-type="float" office:value="2512.0">
            <text:p>2512</text:p>
          </table:table-cell>
          <table:table-cell office:value-type="float" office:value="456781.0">
            <text:p>456781</text:p>
          </table:table-cell>
          <table:table-cell office:value-type="float" office:value="69081.0">
            <text:p>69081</text:p>
          </table:table-cell>
          <table:table-cell office:value-type="float" office:value="277039.0">
            <text:p>277039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7514.0">
            <text:p>7514</text:p>
          </table:table-cell>
          <table:table-cell office:value-type="float" office:value="71712.0">
            <text:p>71712</text:p>
          </table:table-cell>
          <table:table-cell office:value-type="float" office:value="-717.0">
            <text:p>-717</text:p>
          </table:table-cell>
          <table:table-cell office:value-type="float" office:value="-27758.0">
            <text:p>-27758</text:p>
          </table:table-cell>
          <table:table-cell office:value-type="float" office:value="1865.0">
            <text:p>1865</text:p>
          </table:table-cell>
          <table:table-cell office:value-type="float" office:value="22820.0">
            <text:p>22820</text:p>
          </table:table-cell>
          <table:table-cell office:value-type="float" office:value="8741.0">
            <text:p>8741</text:p>
          </table:table-cell>
          <table:table-cell office:value-type="float" office:value="-731345.0">
            <text:p>-731345</text:p>
          </table:table-cell>
          <table:table-cell office:value-type="float" office:value="-1335.0">
            <text:p>-1335</text:p>
          </table:table-cell>
          <table:table-cell office:value-type="float" office:value="-122026.0">
            <text:p>-122026</text:p>
          </table:table-cell>
          <table:table-cell office:value-type="float" office:value="4377.0">
            <text:p>4377</text:p>
          </table:table-cell>
          <table:table-cell office:value-type="float" office:value="536279.0">
            <text:p>536279</text:p>
          </table:table-cell>
          <table:table-cell office:value-type="float" office:value="-66774.0">
            <text:p>-66774</text:p>
          </table:table-cell>
          <table:table-cell office:value-type="float" office:value="317092.0">
            <text:p>317092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20287.0">
            <text:p>-20287</text:p>
          </table:table-cell>
          <table:table-cell office:value-type="float" office:value="52131.0">
            <text:p>52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312.0">
            <text:p>-4312</text:p>
          </table:table-cell>
          <table:table-cell office:value-type="float" office:value="-87448.0">
            <text:p>-87448</text:p>
          </table:table-cell>
          <table:table-cell office:value-type="float" office:value="2885.0">
            <text:p>2885</text:p>
          </table:table-cell>
          <table:table-cell office:value-type="float" office:value="-623035.0">
            <text:p>-623035</text:p>
          </table:table-cell>
          <table:table-cell office:value-type="float" office:value="-835.0">
            <text:p>-835</text:p>
          </table:table-cell>
          <table:table-cell office:value-type="float" office:value="-63079.0">
            <text:p>-63079</text:p>
          </table:table-cell>
          <table:table-cell office:value-type="float" office:value="2935.0">
            <text:p>2935</text:p>
          </table:table-cell>
          <table:table-cell office:value-type="float" office:value="413757.0">
            <text:p>413757</text:p>
          </table:table-cell>
          <table:table-cell office:value-type="float" office:value="35317.0">
            <text:p>35317</text:p>
          </table:table-cell>
          <table:table-cell office:value-type="float" office:value="272357.0">
            <text:p>272357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5355.0">
            <text:p>5355</text:p>
          </table:table-cell>
          <table:table-cell office:value-type="float" office:value="-8452.0">
            <text:p>-8452</text:p>
          </table:table-cell>
          <table:table-cell office:value-type="float" office:value="-760.0">
            <text:p>-760</text:p>
          </table:table-cell>
          <table:table-cell office:value-type="float" office:value="-45409.0">
            <text:p>-45409</text:p>
          </table:table-cell>
          <table:table-cell office:value-type="float" office:value="-347.0">
            <text:p>-347</text:p>
          </table:table-cell>
          <table:table-cell office:value-type="float" office:value="-10096.0">
            <text:p>-10096</text:p>
          </table:table-cell>
          <table:table-cell office:value-type="float" office:value="8240.0">
            <text:p>8240</text:p>
          </table:table-cell>
          <table:table-cell office:value-type="float" office:value="-605538.0">
            <text:p>-605538</text:p>
          </table:table-cell>
          <table:table-cell office:value-type="float" office:value="-1595.0">
            <text:p>-1595</text:p>
          </table:table-cell>
          <table:table-cell office:value-type="float" office:value="-113231.0">
            <text:p>-113231</text:p>
          </table:table-cell>
          <table:table-cell office:value-type="float" office:value="2588.0">
            <text:p>2588</text:p>
          </table:table-cell>
          <table:table-cell office:value-type="float" office:value="405150.0">
            <text:p>405150</text:p>
          </table:table-cell>
          <table:table-cell office:value-type="float" office:value="63957.0">
            <text:p>63957</text:p>
          </table:table-cell>
          <table:table-cell office:value-type="float" office:value="313619.0">
            <text:p>313619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4448.0">
            <text:p>-4448</text:p>
          </table:table-cell>
          <table:table-cell office:value-type="float" office:value="48560.0">
            <text:p>48560</text:p>
          </table:table-cell>
          <table:table-cell office:value-type="float" office:value="60.0">
            <text:p>60</text:p>
          </table:table-cell>
          <table:table-cell office:value-type="float" office:value="413.0">
            <text:p>413</text:p>
          </table:table-cell>
          <table:table-cell office:value-type="float" office:value="-1291.0">
            <text:p>-1291</text:p>
          </table:table-cell>
          <table:table-cell office:value-type="float" office:value="-1544.0">
            <text:p>-1544</text:p>
          </table:table-cell>
          <table:table-cell office:value-type="float" office:value="5341.0">
            <text:p>5341</text:p>
          </table:table-cell>
          <table:table-cell office:value-type="float" office:value="-71112.0">
            <text:p>-71112</text:p>
          </table:table-cell>
          <table:table-cell office:value-type="float" office:value="127.0">
            <text:p>127</text:p>
          </table:table-cell>
          <table:table-cell office:value-type="float" office:value="489.0">
            <text:p>489</text:p>
          </table:table-cell>
          <table:table-cell office:value-type="float" office:value="3551.0">
            <text:p>3551</text:p>
          </table:table-cell>
          <table:table-cell office:value-type="float" office:value="80257.0">
            <text:p>80257</text:p>
          </table:table-cell>
          <table:table-cell office:value-type="float" office:value="-47429.0">
            <text:p>-47429</text:p>
          </table:table-cell>
          <table:table-cell office:value-type="float" office:value="-9634.0">
            <text:p>-963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022.0">
            <text:p>2022</text:p>
          </table:table-cell>
          <table:table-cell office:value-type="float" office:value="8755.0">
            <text:p>875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2.0">
            <text:p>522</text:p>
          </table:table-cell>
          <table:table-cell office:value-type="float" office:value="-1780.0">
            <text:p>-1780</text:p>
          </table:table-cell>
          <table:table-cell office:value-type="float" office:value="7363.0">
            <text:p>7363</text:p>
          </table:table-cell>
          <table:table-cell office:value-type="float" office:value="-54097.0">
            <text:p>-54097</text:p>
          </table:table-cell>
          <table:table-cell office:value-type="float" office:value="127.0">
            <text:p>127</text:p>
          </table:table-cell>
          <table:table-cell office:value-type="float" office:value="227.0">
            <text:p>227</text:p>
          </table:table-cell>
          <table:table-cell office:value-type="float" office:value="4073.0">
            <text:p>4073</text:p>
          </table:table-cell>
          <table:table-cell office:value-type="float" office:value="65542.0">
            <text:p>65542</text:p>
          </table:table-cell>
          <table:table-cell office:value-type="float" office:value="-6975.0">
            <text:p>-6975</text:p>
          </table:table-cell>
          <table:table-cell office:value-type="float" office:value="-11672.0">
            <text:p>-11672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749.0">
            <text:p>-1749</text:p>
          </table:table-cell>
          <table:table-cell office:value-type="float" office:value="-24559.0">
            <text:p>-245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660.0">
            <text:p>2660</text:p>
          </table:table-cell>
          <table:table-cell office:value-type="float" office:value="16068.0">
            <text:p>16068</text:p>
          </table:table-cell>
          <table:table-cell office:value-type="float" office:value="5614.0">
            <text:p>5614</text:p>
          </table:table-cell>
          <table:table-cell office:value-type="float" office:value="-101894.0">
            <text:p>-101894</text:p>
          </table:table-cell>
          <table:table-cell office:value-type="float" office:value="127.0">
            <text:p>127</text:p>
          </table:table-cell>
          <table:table-cell office:value-type="float" office:value="387.0">
            <text:p>387</text:p>
          </table:table-cell>
          <table:table-cell office:value-type="float" office:value="6733.0">
            <text:p>6733</text:p>
          </table:table-cell>
          <table:table-cell office:value-type="float" office:value="114180.0">
            <text:p>114180</text:p>
          </table:table-cell>
          <table:table-cell office:value-type="float" office:value="8491.0">
            <text:p>8491</text:p>
          </table:table-cell>
          <table:table-cell office:value-type="float" office:value="-12673.0">
            <text:p>-12673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7416.0">
            <text:p>-7416</text:p>
          </table:table-cell>
          <table:table-cell office:value-type="float" office:value="59174.0">
            <text:p>591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41.0">
            <text:p>-3941</text:p>
          </table:table-cell>
          <table:table-cell office:value-type="float" office:value="-14935.0">
            <text:p>-14935</text:p>
          </table:table-cell>
          <table:table-cell office:value-type="float" office:value="7294.0">
            <text:p>7294</text:p>
          </table:table-cell>
          <table:table-cell office:value-type="float" office:value="-62898.0">
            <text:p>-62898</text:p>
          </table:table-cell>
          <table:table-cell office:value-type="float" office:value="127.0">
            <text:p>127</text:p>
          </table:table-cell>
          <table:table-cell office:value-type="float" office:value="260.0">
            <text:p>260</text:p>
          </table:table-cell>
          <table:table-cell office:value-type="float" office:value="4559.0">
            <text:p>4559</text:p>
          </table:table-cell>
          <table:table-cell office:value-type="float" office:value="95327.0">
            <text:p>95327</text:p>
          </table:table-cell>
          <table:table-cell office:value-type="float" office:value="-44239.0">
            <text:p>-44239</text:p>
          </table:table-cell>
          <table:table-cell office:value-type="float" office:value="-32689.0">
            <text:p>-32689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1361.0">
            <text:p>-1361</text:p>
          </table:table-cell>
          <table:table-cell office:value-type="float" office:value="-41271.0">
            <text:p>-4127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207.0">
            <text:p>3207</text:p>
          </table:table-cell>
          <table:table-cell office:value-type="float" office:value="27900.0">
            <text:p>27900</text:p>
          </table:table-cell>
          <table:table-cell office:value-type="float" office:value="5933.0">
            <text:p>5933</text:p>
          </table:table-cell>
          <table:table-cell office:value-type="float" office:value="-100501.0">
            <text:p>-100501</text:p>
          </table:table-cell>
          <table:table-cell office:value-type="float" office:value="127.0">
            <text:p>127</text:p>
          </table:table-cell>
          <table:table-cell office:value-type="float" office:value="184.0">
            <text:p>184</text:p>
          </table:table-cell>
          <table:table-cell office:value-type="float" office:value="7766.0">
            <text:p>7766</text:p>
          </table:table-cell>
          <table:table-cell office:value-type="float" office:value="116585.0">
            <text:p>116585</text:p>
          </table:table-cell>
          <table:table-cell office:value-type="float" office:value="13371.0">
            <text:p>13371</text:p>
          </table:table-cell>
          <table:table-cell office:value-type="float" office:value="-16268.0">
            <text:p>-16268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1147.0">
            <text:p>-1147</text:p>
          </table:table-cell>
          <table:table-cell office:value-type="float" office:value="35317.0">
            <text:p>353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4.0">
            <text:p>3054</text:p>
          </table:table-cell>
          <table:table-cell office:value-type="float" office:value="23324.0">
            <text:p>23324</text:p>
          </table:table-cell>
          <table:table-cell office:value-type="float" office:value="6467.0">
            <text:p>6467</text:p>
          </table:table-cell>
          <table:table-cell office:value-type="float" office:value="-174932.0">
            <text:p>-174932</text:p>
          </table:table-cell>
          <table:table-cell office:value-type="float" office:value="127.0">
            <text:p>127</text:p>
          </table:table-cell>
          <table:table-cell office:value-type="float" office:value="333.0">
            <text:p>333</text:p>
          </table:table-cell>
          <table:table-cell office:value-type="float" office:value="8055.0">
            <text:p>8055</text:p>
          </table:table-cell>
          <table:table-cell office:value-type="float" office:value="182661.0">
            <text:p>182661</text:p>
          </table:table-cell>
          <table:table-cell office:value-type="float" office:value="-58641.0">
            <text:p>-58641</text:p>
          </table:table-cell>
          <table:table-cell office:value-type="float" office:value="-8062.0">
            <text:p>-806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8592.0">
            <text:p>8592</text:p>
          </table:table-cell>
          <table:table-cell office:value-type="float" office:value="61008.0">
            <text:p>610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2.0">
            <text:p>202</text:p>
          </table:table-cell>
          <table:table-cell office:value-type="float" office:value="-14211.0">
            <text:p>-14211</text:p>
          </table:table-cell>
          <table:table-cell office:value-type="float" office:value="15059.0">
            <text:p>15059</text:p>
          </table:table-cell>
          <table:table-cell office:value-type="float" office:value="-121766.0">
            <text:p>-121766</text:p>
          </table:table-cell>
          <table:table-cell office:value-type="float" office:value="127.0">
            <text:p>127</text:p>
          </table:table-cell>
          <table:table-cell office:value-type="float" office:value="73.0">
            <text:p>73</text:p>
          </table:table-cell>
          <table:table-cell office:value-type="float" office:value="8257.0">
            <text:p>8257</text:p>
          </table:table-cell>
          <table:table-cell office:value-type="float" office:value="151052.0">
            <text:p>151052</text:p>
          </table:table-cell>
          <table:table-cell office:value-type="float" office:value="-46797.0">
            <text:p>-46797</text:p>
          </table:table-cell>
          <table:table-cell office:value-type="float" office:value="-29359.0">
            <text:p>-29359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392.0">
            <text:p>-392</text:p>
          </table:table-cell>
          <table:table-cell office:value-type="float" office:value="17403.0">
            <text:p>174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1.0">
            <text:p>811</text:p>
          </table:table-cell>
          <table:table-cell office:value-type="float" office:value="-3929.0">
            <text:p>-3929</text:p>
          </table:table-cell>
          <table:table-cell office:value-type="float" office:value="14667.0">
            <text:p>14667</text:p>
          </table:table-cell>
          <table:table-cell office:value-type="float" office:value="-120313.0">
            <text:p>-120313</text:p>
          </table:table-cell>
          <table:table-cell office:value-type="float" office:value="127.0">
            <text:p>127</text:p>
          </table:table-cell>
          <table:table-cell office:value-type="float" office:value="37.0">
            <text:p>37</text:p>
          </table:table-cell>
          <table:table-cell office:value-type="float" office:value="9068.0">
            <text:p>9068</text:p>
          </table:table-cell>
          <table:table-cell office:value-type="float" office:value="181183.0">
            <text:p>181183</text:p>
          </table:table-cell>
          <table:table-cell office:value-type="float" office:value="-13474.0">
            <text:p>-13474</text:p>
          </table:table-cell>
          <table:table-cell office:value-type="float" office:value="-60907.0">
            <text:p>-60907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0801.0">
            <text:p>-10801</text:p>
          </table:table-cell>
          <table:table-cell office:value-type="float" office:value="76437.0">
            <text:p>76437</text:p>
          </table:table-cell>
          <table:table-cell office:value-type="float" office:value="13.0">
            <text:p>13</text:p>
          </table:table-cell>
          <table:table-cell office:value-type="float" office:value="800.0">
            <text:p>800</text:p>
          </table:table-cell>
          <table:table-cell office:value-type="float" office:value="631.0">
            <text:p>631</text:p>
          </table:table-cell>
          <table:table-cell office:value-type="float" office:value="-8612.0">
            <text:p>-8612</text:p>
          </table:table-cell>
          <table:table-cell office:value-type="float" office:value="470.0">
            <text:p>470</text:p>
          </table:table-cell>
          <table:table-cell office:value-type="float" office:value="-48995.0">
            <text:p>-48995</text:p>
          </table:table-cell>
          <table:table-cell office:value-type="float" office:value="13.0">
            <text:p>13</text:p>
          </table:table-cell>
          <table:table-cell office:value-type="float" office:value="822.0">
            <text:p>822</text:p>
          </table:table-cell>
          <table:table-cell office:value-type="float" office:value="3832.0">
            <text:p>3832</text:p>
          </table:table-cell>
          <table:table-cell office:value-type="float" office:value="113860.0">
            <text:p>113860</text:p>
          </table:table-cell>
          <table:table-cell office:value-type="float" office:value="-68625.0">
            <text:p>-68625</text:p>
          </table:table-cell>
          <table:table-cell office:value-type="float" office:value="-65687.0">
            <text:p>-65687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4481.0">
            <text:p>4481</text:p>
          </table:table-cell>
          <table:table-cell office:value-type="float" office:value="-12415.0">
            <text:p>-124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13581.0">
            <text:p>-13581</text:p>
          </table:table-cell>
          <table:table-cell office:value-type="float" office:value="4951.0">
            <text:p>4951</text:p>
          </table:table-cell>
          <table:table-cell office:value-type="float" office:value="-24032.0">
            <text:p>-24032</text:p>
          </table:table-cell>
          <table:table-cell office:value-type="float" office:value="13.0">
            <text:p>13</text:p>
          </table:table-cell>
          <table:table-cell office:value-type="float" office:value="503.0">
            <text:p>503</text:p>
          </table:table-cell>
          <table:table-cell office:value-type="float" office:value="3670.0">
            <text:p>3670</text:p>
          </table:table-cell>
          <table:table-cell office:value-type="float" office:value="60217.0">
            <text:p>60217</text:p>
          </table:table-cell>
          <table:table-cell office:value-type="float" office:value="25996.0">
            <text:p>25996</text:p>
          </table:table-cell>
          <table:table-cell office:value-type="float" office:value="-36688.0">
            <text:p>-36688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20935.0">
            <text:p>-20935</text:p>
          </table:table-cell>
          <table:table-cell office:value-type="float" office:value="28300.0">
            <text:p>2830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36.0">
            <text:p>-2236</text:p>
          </table:table-cell>
          <table:table-cell office:value-type="float" office:value="-39603.0">
            <text:p>-39603</text:p>
          </table:table-cell>
          <table:table-cell office:value-type="float" office:value="1075.0">
            <text:p>1075</text:p>
          </table:table-cell>
          <table:table-cell office:value-type="float" office:value="9252.0">
            <text:p>9252</text:p>
          </table:table-cell>
          <table:table-cell office:value-type="float" office:value="13.0">
            <text:p>13</text:p>
          </table:table-cell>
          <table:table-cell office:value-type="float" office:value="328.0">
            <text:p>328</text:p>
          </table:table-cell>
          <table:table-cell office:value-type="float" office:value="3893.0">
            <text:p>3893</text:p>
          </table:table-cell>
          <table:table-cell office:value-type="float" office:value="26487.0">
            <text:p>26487</text:p>
          </table:table-cell>
          <table:table-cell office:value-type="float" office:value="11303.0">
            <text:p>11303</text:p>
          </table:table-cell>
          <table:table-cell office:value-type="float" office:value="-36067.0">
            <text:p>-3606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392.0">
            <text:p>1392</text:p>
          </table:table-cell>
          <table:table-cell office:value-type="float" office:value="-4313.0">
            <text:p>-4313</text:p>
          </table:table-cell>
          <table:table-cell office:value-type="float" office:value="80.0">
            <text:p>80</text:p>
          </table:table-cell>
          <table:table-cell office:value-type="float" office:value="1395.0">
            <text:p>1395</text:p>
          </table:table-cell>
          <table:table-cell office:value-type="float" office:value="1540.0">
            <text:p>1540</text:p>
          </table:table-cell>
          <table:table-cell office:value-type="float" office:value="14404.0">
            <text:p>14404</text:p>
          </table:table-cell>
          <table:table-cell office:value-type="float" office:value="2467.0">
            <text:p>2467</text:p>
          </table:table-cell>
          <table:table-cell office:value-type="float" office:value="-2177.0">
            <text:p>-2177</text:p>
          </table:table-cell>
          <table:table-cell office:value-type="float" office:value="93.0">
            <text:p>93</text:p>
          </table:table-cell>
          <table:table-cell office:value-type="float" office:value="1330.0">
            <text:p>1330</text:p>
          </table:table-cell>
          <table:table-cell office:value-type="float" office:value="5433.0">
            <text:p>5433</text:p>
          </table:table-cell>
          <table:table-cell office:value-type="float" office:value="34463.0">
            <text:p>34463</text:p>
          </table:table-cell>
          <table:table-cell office:value-type="float" office:value="-11486.0">
            <text:p>-11486</text:p>
          </table:table-cell>
          <table:table-cell office:value-type="float" office:value="-33616.0">
            <text:p>-3361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1979.0">
            <text:p>-1979</text:p>
          </table:table-cell>
          <table:table-cell office:value-type="float" office:value="-10498.0">
            <text:p>-1049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21283.0">
            <text:p>21283</text:p>
          </table:table-cell>
          <table:table-cell office:value-type="float" office:value="488.0">
            <text:p>488</text:p>
          </table:table-cell>
          <table:table-cell office:value-type="float" office:value="-4064.0">
            <text:p>-4064</text:p>
          </table:table-cell>
          <table:table-cell office:value-type="float" office:value="93.0">
            <text:p>93</text:p>
          </table:table-cell>
          <table:table-cell office:value-type="float" office:value="1129.0">
            <text:p>1129</text:p>
          </table:table-cell>
          <table:table-cell office:value-type="float" office:value="7043.0">
            <text:p>7043</text:p>
          </table:table-cell>
          <table:table-cell office:value-type="float" office:value="54450.0">
            <text:p>54450</text:p>
          </table:table-cell>
          <table:table-cell office:value-type="float" office:value="-10785.0">
            <text:p>-10785</text:p>
          </table:table-cell>
          <table:table-cell office:value-type="float" office:value="-51515.0">
            <text:p>-51515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4721.0">
            <text:p>-14721</text:p>
          </table:table-cell>
          <table:table-cell office:value-type="float" office:value="-61291.0">
            <text:p>-612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949.0">
            <text:p>949</text:p>
          </table:table-cell>
          <table:table-cell office:value-type="float" office:value="8508.0">
            <text:p>8508</text:p>
          </table:table-cell>
          <table:table-cell office:value-type="float" office:value="3847.0">
            <text:p>3847</text:p>
          </table:table-cell>
          <table:table-cell office:value-type="float" office:value="-56785.0">
            <text:p>-56785</text:p>
          </table:table-cell>
          <table:table-cell office:value-type="float" office:value="93.0">
            <text:p>93</text:p>
          </table:table-cell>
          <table:table-cell office:value-type="float" office:value="931.0">
            <text:p>931</text:p>
          </table:table-cell>
          <table:table-cell office:value-type="float" office:value="4136.0">
            <text:p>4136</text:p>
          </table:table-cell>
          <table:table-cell office:value-type="float" office:value="53916.0">
            <text:p>53916</text:p>
          </table:table-cell>
          <table:table-cell office:value-type="float" office:value="52783.0">
            <text:p>52783</text:p>
          </table:table-cell>
          <table:table-cell office:value-type="float" office:value="1938.0">
            <text:p>193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2482.0">
            <text:p>2482</text:p>
          </table:table-cell>
          <table:table-cell office:value-type="float" office:value="69490.0">
            <text:p>694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2843.0">
            <text:p>42843</text:p>
          </table:table-cell>
          <table:table-cell office:value-type="float" office:value="6329.0">
            <text:p>6329</text:p>
          </table:table-cell>
          <table:table-cell office:value-type="float" office:value="22270.0">
            <text:p>22270</text:p>
          </table:table-cell>
          <table:table-cell office:value-type="float" office:value="93.0">
            <text:p>93</text:p>
          </table:table-cell>
          <table:table-cell office:value-type="float" office:value="1266.0">
            <text:p>1266</text:p>
          </table:table-cell>
          <table:table-cell office:value-type="float" office:value="6343.0">
            <text:p>6343</text:p>
          </table:table-cell>
          <table:table-cell office:value-type="float" office:value="128599.0">
            <text:p>128599</text:p>
          </table:table-cell>
          <table:table-cell office:value-type="float" office:value="-112333.0">
            <text:p>-112333</text:p>
          </table:table-cell>
          <table:table-cell office:value-type="float" office:value="-152135.0">
            <text:p>-152135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26401.0">
            <text:p>-26401</text:p>
          </table:table-cell>
          <table:table-cell office:value-type="float" office:value="-76708.0">
            <text:p>-767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457.0">
            <text:p>-3457</text:p>
          </table:table-cell>
          <table:table-cell office:value-type="float" office:value="-18223.0">
            <text:p>-18223</text:p>
          </table:table-cell>
          <table:table-cell office:value-type="float" office:value="3338.0">
            <text:p>3338</text:p>
          </table:table-cell>
          <table:table-cell office:value-type="float" office:value="-57345.0">
            <text:p>-57345</text:p>
          </table:table-cell>
          <table:table-cell office:value-type="float" office:value="93.0">
            <text:p>93</text:p>
          </table:table-cell>
          <table:table-cell office:value-type="float" office:value="651.0">
            <text:p>651</text:p>
          </table:table-cell>
          <table:table-cell office:value-type="float" office:value="5043.0">
            <text:p>5043</text:p>
          </table:table-cell>
          <table:table-cell office:value-type="float" office:value="101887.0">
            <text:p>101887</text:p>
          </table:table-cell>
          <table:table-cell office:value-type="float" office:value="94931.0">
            <text:p>94931</text:p>
          </table:table-cell>
          <table:table-cell office:value-type="float" office:value="-45193.0">
            <text:p>-45193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1083.0">
            <text:p>1083</text:p>
          </table:table-cell>
          <table:table-cell office:value-type="float" office:value="1892.0">
            <text:p>18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774.0">
            <text:p>1774</text:p>
          </table:table-cell>
          <table:table-cell office:value-type="float" office:value="13913.0">
            <text:p>13913</text:p>
          </table:table-cell>
          <table:table-cell office:value-type="float" office:value="4421.0">
            <text:p>4421</text:p>
          </table:table-cell>
          <table:table-cell office:value-type="float" office:value="-61126.0">
            <text:p>-61126</text:p>
          </table:table-cell>
          <table:table-cell office:value-type="float" office:value="93.0">
            <text:p>93</text:p>
          </table:table-cell>
          <table:table-cell office:value-type="float" office:value="431.0">
            <text:p>431</text:p>
          </table:table-cell>
          <table:table-cell office:value-type="float" office:value="6817.0">
            <text:p>6817</text:p>
          </table:table-cell>
          <table:table-cell office:value-type="float" office:value="107568.0">
            <text:p>107568</text:p>
          </table:table-cell>
          <table:table-cell office:value-type="float" office:value="-15805.0">
            <text:p>-15805</text:p>
          </table:table-cell>
          <table:table-cell office:value-type="float" office:value="-46873.0">
            <text:p>-46873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439.0">
            <text:p>439</text:p>
          </table:table-cell>
          <table:table-cell office:value-type="float" office:value="-8442.0">
            <text:p>-84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7.0">
            <text:p>637</text:p>
          </table:table-cell>
          <table:table-cell office:value-type="float" office:value="5074.0">
            <text:p>5074</text:p>
          </table:table-cell>
          <table:table-cell office:value-type="float" office:value="4860.0">
            <text:p>4860</text:p>
          </table:table-cell>
          <table:table-cell office:value-type="float" office:value="-69005.0">
            <text:p>-69005</text:p>
          </table:table-cell>
          <table:table-cell office:value-type="float" office:value="93.0">
            <text:p>93</text:p>
          </table:table-cell>
          <table:table-cell office:value-type="float" office:value="287.0">
            <text:p>287</text:p>
          </table:table-cell>
          <table:table-cell office:value-type="float" office:value="7454.0">
            <text:p>7454</text:p>
          </table:table-cell>
          <table:table-cell office:value-type="float" office:value="109235.0">
            <text:p>109235</text:p>
          </table:table-cell>
          <table:table-cell office:value-type="float" office:value="3368.0">
            <text:p>3368</text:p>
          </table:table-cell>
          <table:table-cell office:value-type="float" office:value="-40517.0">
            <text:p>-40517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4132.0">
            <text:p>-24132</text:p>
          </table:table-cell>
          <table:table-cell office:value-type="float" office:value="-40714.0">
            <text:p>-407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.0">
            <text:p>-9</text:p>
          </table:table-cell>
          <table:table-cell office:value-type="float" office:value="-11322.0">
            <text:p>-11322</text:p>
          </table:table-cell>
          <table:table-cell office:value-type="float" office:value="3633.0">
            <text:p>3633</text:p>
          </table:table-cell>
          <table:table-cell office:value-type="float" office:value="-68734.0">
            <text:p>-68734</text:p>
          </table:table-cell>
          <table:table-cell office:value-type="float" office:value="93.0">
            <text:p>93</text:p>
          </table:table-cell>
          <table:table-cell office:value-type="float" office:value="167.0">
            <text:p>167</text:p>
          </table:table-cell>
          <table:table-cell office:value-type="float" office:value="7029.0">
            <text:p>7029</text:p>
          </table:table-cell>
          <table:table-cell office:value-type="float" office:value="90551.0">
            <text:p>90551</text:p>
          </table:table-cell>
          <table:table-cell office:value-type="float" office:value="52036.0">
            <text:p>52036</text:p>
          </table:table-cell>
          <table:table-cell office:value-type="float" office:value="-21984.0">
            <text:p>-21984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5401.0">
            <text:p>5401</text:p>
          </table:table-cell>
          <table:table-cell office:value-type="float" office:value="15543.0">
            <text:p>1554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2.0">
            <text:p>812</text:p>
          </table:table-cell>
          <table:table-cell office:value-type="float" office:value="-2336.0">
            <text:p>-2336</text:p>
          </table:table-cell>
          <table:table-cell office:value-type="float" office:value="9034.0">
            <text:p>9034</text:p>
          </table:table-cell>
          <table:table-cell office:value-type="float" office:value="-57196.0">
            <text:p>-57196</text:p>
          </table:table-cell>
          <table:table-cell office:value-type="float" office:value="93.0">
            <text:p>93</text:p>
          </table:table-cell>
          <table:table-cell office:value-type="float" office:value="136.0">
            <text:p>136</text:p>
          </table:table-cell>
          <table:table-cell office:value-type="float" office:value="7841.0">
            <text:p>7841</text:p>
          </table:table-cell>
          <table:table-cell office:value-type="float" office:value="90802.0">
            <text:p>90802</text:p>
          </table:table-cell>
          <table:table-cell office:value-type="float" office:value="-13207.0">
            <text:p>-13207</text:p>
          </table:table-cell>
          <table:table-cell office:value-type="float" office:value="-33742.0">
            <text:p>-33742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911.0">
            <text:p>-5911</text:p>
          </table:table-cell>
          <table:table-cell office:value-type="float" office:value="127624.0">
            <text:p>12762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12.0">
            <text:p>-712</text:p>
          </table:table-cell>
          <table:table-cell office:value-type="float" office:value="-26664.0">
            <text:p>-26664</text:p>
          </table:table-cell>
          <table:table-cell office:value-type="float" office:value="5015.0">
            <text:p>5015</text:p>
          </table:table-cell>
          <table:table-cell office:value-type="float" office:value="5409.0">
            <text:p>5409</text:p>
          </table:table-cell>
          <table:table-cell office:value-type="float" office:value="93.0">
            <text:p>93</text:p>
          </table:table-cell>
          <table:table-cell office:value-type="float" office:value="189.0">
            <text:p>189</text:p>
          </table:table-cell>
          <table:table-cell office:value-type="float" office:value="6491.0">
            <text:p>6491</text:p>
          </table:table-cell>
          <table:table-cell office:value-type="float" office:value="99972.0">
            <text:p>99972</text:p>
          </table:table-cell>
          <table:table-cell office:value-type="float" office:value="-100960.0">
            <text:p>-100960</text:p>
          </table:table-cell>
          <table:table-cell office:value-type="float" office:value="-105570.0">
            <text:p>-105570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3918.0">
            <text:p>3918</text:p>
          </table:table-cell>
          <table:table-cell office:value-type="float" office:value="-18199.0">
            <text:p>-18199</text:p>
          </table:table-cell>
          <table:table-cell office:value-type="float" office:value="100.0">
            <text:p>100</text:p>
          </table:table-cell>
          <table:table-cell office:value-type="float" office:value="764.0">
            <text:p>764</text:p>
          </table:table-cell>
          <table:table-cell office:value-type="float" office:value="86.0">
            <text:p>86</text:p>
          </table:table-cell>
          <table:table-cell office:value-type="float" office:value="20980.0">
            <text:p>20980</text:p>
          </table:table-cell>
          <table:table-cell office:value-type="float" office:value="8933.0">
            <text:p>8933</text:p>
          </table:table-cell>
          <table:table-cell office:value-type="float" office:value="239605.0">
            <text:p>239605</text:p>
          </table:table-cell>
          <table:table-cell office:value-type="float" office:value="193.0">
            <text:p>193</text:p>
          </table:table-cell>
          <table:table-cell office:value-type="float" office:value="2568.0">
            <text:p>2568</text:p>
          </table:table-cell>
          <table:table-cell office:value-type="float" office:value="6577.0">
            <text:p>6577</text:p>
          </table:table-cell>
          <table:table-cell office:value-type="float" office:value="260137.0">
            <text:p>260137</text:p>
          </table:table-cell>
          <table:table-cell office:value-type="float" office:value="-3545.0">
            <text:p>-3545</text:p>
          </table:table-cell>
          <table:table-cell office:value-type="float" office:value="-502310.0">
            <text:p>-502310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8640.0">
            <text:p>-8640</text:p>
          </table:table-cell>
          <table:table-cell office:value-type="float" office:value="-126130.0">
            <text:p>-126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16.0">
            <text:p>2416</text:p>
          </table:table-cell>
          <table:table-cell office:value-type="float" office:value="19655.0">
            <text:p>19655</text:p>
          </table:table-cell>
          <table:table-cell office:value-type="float" office:value="293.0">
            <text:p>293</text:p>
          </table:table-cell>
          <table:table-cell office:value-type="float" office:value="-44201.0">
            <text:p>-44201</text:p>
          </table:table-cell>
          <table:table-cell office:value-type="float" office:value="193.0">
            <text:p>193</text:p>
          </table:table-cell>
          <table:table-cell office:value-type="float" office:value="599.0">
            <text:p>599</text:p>
          </table:table-cell>
          <table:table-cell office:value-type="float" office:value="8993.0">
            <text:p>8993</text:p>
          </table:table-cell>
          <table:table-cell office:value-type="float" office:value="160768.0">
            <text:p>160768</text:p>
          </table:table-cell>
          <table:table-cell office:value-type="float" office:value="106475.0">
            <text:p>106475</text:p>
          </table:table-cell>
          <table:table-cell office:value-type="float" office:value="-117166.0">
            <text:p>-117166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17275.0">
            <text:p>-17275</text:p>
          </table:table-cell>
          <table:table-cell office:value-type="float" office:value="-7518.0">
            <text:p>-751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3.0">
            <text:p>-33</text:p>
          </table:table-cell>
          <table:table-cell office:value-type="float" office:value="12356.0">
            <text:p>12356</text:p>
          </table:table-cell>
          <table:table-cell office:value-type="float" office:value="-1211.0">
            <text:p>-1211</text:p>
          </table:table-cell>
          <table:table-cell office:value-type="float" office:value="-145422.0">
            <text:p>-145422</text:p>
          </table:table-cell>
          <table:table-cell office:value-type="float" office:value="193.0">
            <text:p>193</text:p>
          </table:table-cell>
          <table:table-cell office:value-type="float" office:value="2131.0">
            <text:p>2131</text:p>
          </table:table-cell>
          <table:table-cell office:value-type="float" office:value="6363.0">
            <text:p>6363</text:p>
          </table:table-cell>
          <table:table-cell office:value-type="float" office:value="252923.0">
            <text:p>252923</text:p>
          </table:table-cell>
          <table:table-cell office:value-type="float" office:value="-4838.0">
            <text:p>-4838</text:p>
          </table:table-cell>
          <table:table-cell office:value-type="float" office:value="-109632.0">
            <text:p>-109632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6701.0">
            <text:p>6701</text:p>
          </table:table-cell>
          <table:table-cell office:value-type="float" office:value="104607.0">
            <text:p>1046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50.0">
            <text:p>-950</text:p>
          </table:table-cell>
          <table:table-cell office:value-type="float" office:value="-16778.0">
            <text:p>-16778</text:p>
          </table:table-cell>
          <table:table-cell office:value-type="float" office:value="5490.0">
            <text:p>5490</text:p>
          </table:table-cell>
          <table:table-cell office:value-type="float" office:value="-59172.0">
            <text:p>-59172</text:p>
          </table:table-cell>
          <table:table-cell office:value-type="float" office:value="193.0">
            <text:p>193</text:p>
          </table:table-cell>
          <table:table-cell office:value-type="float" office:value="974.0">
            <text:p>974</text:p>
          </table:table-cell>
          <table:table-cell office:value-type="float" office:value="5413.0">
            <text:p>5413</text:p>
          </table:table-cell>
          <table:table-cell office:value-type="float" office:value="224675.0">
            <text:p>224675</text:p>
          </table:table-cell>
          <table:table-cell office:value-type="float" office:value="-87829.0">
            <text:p>-87829</text:p>
          </table:table-cell>
          <table:table-cell office:value-type="float" office:value="-166477.0">
            <text:p>-166477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500.0">
            <text:p>-500</text:p>
          </table:table-cell>
          <table:table-cell office:value-type="float" office:value="-4202548.0">
            <text:p>-4202548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6.0">
            <text:p>26</text:p>
          </table:table-cell>
          <table:table-cell office:value-type="float" office:value="230601.0">
            <text:p>230601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384.0">
            <text:p>-384</text:p>
          </table:table-cell>
          <table:table-cell office:value-type="float" office:value="-3183885.0">
            <text:p>-3183885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383.0">
            <text:p>383</text:p>
          </table:table-cell>
          <table:table-cell office:value-type="float" office:value="3210220.0">
            <text:p>3210220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622.0">
            <text:p>622</text:p>
          </table:table-cell>
          <table:table-cell office:value-type="float" office:value="5219361.0">
            <text:p>5219361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734.0">
            <text:p>734</text:p>
          </table:table-cell>
          <table:table-cell office:value-type="float" office:value="6099825.0">
            <text:p>6099825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1550.0">
            <text:p>1550</text:p>
          </table:table-cell>
          <table:table-cell office:value-type="float" office:value="12708480.0">
            <text:p>12708480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2612.0">
            <text:p>2612</text:p>
          </table:table-cell>
          <table:table-cell office:value-type="float" office:value="21100898.0">
            <text:p>21100898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2448.0">
            <text:p>2448</text:p>
          </table:table-cell>
          <table:table-cell office:value-type="float" office:value="19629711.0">
            <text:p>19629711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1255.0">
            <text:p>1255</text:p>
          </table:table-cell>
          <table:table-cell office:value-type="float" office:value="10403570.0">
            <text:p>10403570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929.0">
            <text:p>929</text:p>
          </table:table-cell>
          <table:table-cell office:value-type="float" office:value="7877420.0">
            <text:p>7877420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728.0">
            <text:p>1728</text:p>
          </table:table-cell>
          <table:table-cell office:value-type="float" office:value="15149604.0">
            <text:p>1514960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1993.0">
            <text:p>1993</text:p>
          </table:table-cell>
          <table:table-cell office:value-type="float" office:value="17469986.0">
            <text:p>17469986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1661.0">
            <text:p>1661</text:p>
          </table:table-cell>
          <table:table-cell office:value-type="float" office:value="14868589.0">
            <text:p>148685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3884.0">
            <text:p>3884</text:p>
          </table:table-cell>
          <table:table-cell office:value-type="float" office:value="34037706.0">
            <text:p>3403770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2074.0">
            <text:p>2074</text:p>
          </table:table-cell>
          <table:table-cell office:value-type="float" office:value="18782710.0">
            <text:p>18782710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2456.0">
            <text:p>2456</text:p>
          </table:table-cell>
          <table:table-cell office:value-type="float" office:value="22599597.0">
            <text:p>22599597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564.0">
            <text:p>2564</text:p>
          </table:table-cell>
          <table:table-cell office:value-type="float" office:value="23625423.0">
            <text:p>23625423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2474.0">
            <text:p>2474</text:p>
          </table:table-cell>
          <table:table-cell office:value-type="float" office:value="23173262.0">
            <text:p>23173262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3219.0">
            <text:p>3219</text:p>
          </table:table-cell>
          <table:table-cell office:value-type="float" office:value="29794619.0">
            <text:p>29794619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4807.0">
            <text:p>4807</text:p>
          </table:table-cell>
          <table:table-cell office:value-type="float" office:value="43455533.0">
            <text:p>43455533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5446.0">
            <text:p>5446</text:p>
          </table:table-cell>
          <table:table-cell office:value-type="float" office:value="46913833.0">
            <text:p>46913833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4077.0">
            <text:p>4077</text:p>
          </table:table-cell>
          <table:table-cell office:value-type="float" office:value="36428693.0">
            <text:p>36428693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4853.0">
            <text:p>4853</text:p>
          </table:table-cell>
          <table:table-cell office:value-type="float" office:value="42097806.0">
            <text:p>42097806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4155.0">
            <text:p>4155</text:p>
          </table:table-cell>
          <table:table-cell office:value-type="float" office:value="35916571.0">
            <text:p>35916571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