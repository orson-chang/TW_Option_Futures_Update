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2643.0">
            <text:p>2643</text:p>
          </table:table-cell>
          <table:table-cell office:value-type="float" office:value="-127052.0">
            <text:p>-1270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6.0">
            <text:p>1326</text:p>
          </table:table-cell>
          <table:table-cell office:value-type="float" office:value="13373.0">
            <text:p>13373</text:p>
          </table:table-cell>
          <table:table-cell office:value-type="float" office:value="6184.0">
            <text:p>6184</text:p>
          </table:table-cell>
          <table:table-cell office:value-type="float" office:value="-355637.0">
            <text:p>-355637</text:p>
          </table:table-cell>
          <table:table-cell office:value-type="float" office:value="-1408.0">
            <text:p>-1408</text:p>
          </table:table-cell>
          <table:table-cell office:value-type="float" office:value="-107667.0">
            <text:p>-107667</text:p>
          </table:table-cell>
          <table:table-cell office:value-type="float" office:value="1075.0">
            <text:p>1075</text:p>
          </table:table-cell>
          <table:table-cell office:value-type="float" office:value="-283200.0">
            <text:p>-283200</text:p>
          </table:table-cell>
          <table:table-cell office:value-type="float" office:value="113679.0">
            <text:p>113679</text:p>
          </table:table-cell>
          <table:table-cell office:value-type="float" office:value="746504.0">
            <text:p>746504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19272.0">
            <text:p>-19272</text:p>
          </table:table-cell>
          <table:table-cell office:value-type="float" office:value="-33117.0">
            <text:p>-33117</text:p>
          </table:table-cell>
          <table:table-cell office:value-type="float" office:value="-410.0">
            <text:p>-410</text:p>
          </table:table-cell>
          <table:table-cell office:value-type="float" office:value="-42266.0">
            <text:p>-42266</text:p>
          </table:table-cell>
          <table:table-cell office:value-type="float" office:value="-1382.0">
            <text:p>-1382</text:p>
          </table:table-cell>
          <table:table-cell office:value-type="float" office:value="-39740.0">
            <text:p>-39740</text:p>
          </table:table-cell>
          <table:table-cell office:value-type="float" office:value="-773.0">
            <text:p>-773</text:p>
          </table:table-cell>
          <table:table-cell office:value-type="float" office:value="-294248.0">
            <text:p>-294248</text:p>
          </table:table-cell>
          <table:table-cell office:value-type="float" office:value="-1538.0">
            <text:p>-1538</text:p>
          </table:table-cell>
          <table:table-cell office:value-type="float" office:value="-98184.0">
            <text:p>-98184</text:p>
          </table:table-cell>
          <table:table-cell office:value-type="float" office:value="-765.0">
            <text:p>-765</text:p>
          </table:table-cell>
          <table:table-cell office:value-type="float" office:value="-251788.0">
            <text:p>-251788</text:p>
          </table:table-cell>
          <table:table-cell office:value-type="float" office:value="115123.0">
            <text:p>115123</text:p>
          </table:table-cell>
          <table:table-cell office:value-type="float" office:value="644220.0">
            <text:p>644220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7636.0">
            <text:p>7636</text:p>
          </table:table-cell>
          <table:table-cell office:value-type="float" office:value="-1969.0">
            <text:p>-1969</text:p>
          </table:table-cell>
          <table:table-cell office:value-type="float" office:value="-50.0">
            <text:p>-50</text:p>
          </table:table-cell>
          <table:table-cell office:value-type="float" office:value="-1887.0">
            <text:p>-1887</text:p>
          </table:table-cell>
          <table:table-cell office:value-type="float" office:value="-209.0">
            <text:p>-209</text:p>
          </table:table-cell>
          <table:table-cell office:value-type="float" office:value="-5696.0">
            <text:p>-5696</text:p>
          </table:table-cell>
          <table:table-cell office:value-type="float" office:value="6863.0">
            <text:p>6863</text:p>
          </table:table-cell>
          <table:table-cell office:value-type="float" office:value="-301528.0">
            <text:p>-301528</text:p>
          </table:table-cell>
          <table:table-cell office:value-type="float" office:value="-1588.0">
            <text:p>-1588</text:p>
          </table:table-cell>
          <table:table-cell office:value-type="float" office:value="-101295.0">
            <text:p>-101295</text:p>
          </table:table-cell>
          <table:table-cell office:value-type="float" office:value="-974.0">
            <text:p>-974</text:p>
          </table:table-cell>
          <table:table-cell office:value-type="float" office:value="-265490.0">
            <text:p>-265490</text:p>
          </table:table-cell>
          <table:table-cell office:value-type="float" office:value="9552.0">
            <text:p>9552</text:p>
          </table:table-cell>
          <table:table-cell office:value-type="float" office:value="668313.0">
            <text:p>668313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19072.0">
            <text:p>-19072</text:p>
          </table:table-cell>
          <table:table-cell office:value-type="float" office:value="-12381.0">
            <text:p>-12381</text:p>
          </table:table-cell>
          <table:table-cell office:value-type="float" office:value="-570.0">
            <text:p>-570</text:p>
          </table:table-cell>
          <table:table-cell office:value-type="float" office:value="-46825.0">
            <text:p>-46825</text:p>
          </table:table-cell>
          <table:table-cell office:value-type="float" office:value="-3020.0">
            <text:p>-3020</text:p>
          </table:table-cell>
          <table:table-cell office:value-type="float" office:value="-27586.0">
            <text:p>-27586</text:p>
          </table:table-cell>
          <table:table-cell office:value-type="float" office:value="-1997.0">
            <text:p>-1997</text:p>
          </table:table-cell>
          <table:table-cell office:value-type="float" office:value="-131477.0">
            <text:p>-131477</text:p>
          </table:table-cell>
          <table:table-cell office:value-type="float" office:value="-1708.0">
            <text:p>-1708</text:p>
          </table:table-cell>
          <table:table-cell office:value-type="float" office:value="-71449.0">
            <text:p>-71449</text:p>
          </table:table-cell>
          <table:table-cell office:value-type="float" office:value="-1022.0">
            <text:p>-1022</text:p>
          </table:table-cell>
          <table:table-cell office:value-type="float" office:value="-188886.0">
            <text:p>-188886</text:p>
          </table:table-cell>
          <table:table-cell office:value-type="float" office:value="86792.0">
            <text:p>86792</text:p>
          </table:table-cell>
          <table:table-cell office:value-type="float" office:value="391812.0">
            <text:p>391812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4916.0">
            <text:p>4916</text:p>
          </table:table-cell>
          <table:table-cell office:value-type="float" office:value="49010.0">
            <text:p>49010</text:p>
          </table:table-cell>
          <table:table-cell office:value-type="float" office:value="-49.0">
            <text:p>-49</text:p>
          </table:table-cell>
          <table:table-cell office:value-type="float" office:value="-1972.0">
            <text:p>-1972</text:p>
          </table:table-cell>
          <table:table-cell office:value-type="float" office:value="1031.0">
            <text:p>1031</text:p>
          </table:table-cell>
          <table:table-cell office:value-type="float" office:value="-22257.0">
            <text:p>-22257</text:p>
          </table:table-cell>
          <table:table-cell office:value-type="float" office:value="2919.0">
            <text:p>2919</text:p>
          </table:table-cell>
          <table:table-cell office:value-type="float" office:value="-121652.0">
            <text:p>-121652</text:p>
          </table:table-cell>
          <table:table-cell office:value-type="float" office:value="-1757.0">
            <text:p>-1757</text:p>
          </table:table-cell>
          <table:table-cell office:value-type="float" office:value="-95723.0">
            <text:p>-95723</text:p>
          </table:table-cell>
          <table:table-cell office:value-type="float" office:value="9.0">
            <text:p>9</text:p>
          </table:table-cell>
          <table:table-cell office:value-type="float" office:value="-238484.0">
            <text:p>-238484</text:p>
          </table:table-cell>
          <table:table-cell office:value-type="float" office:value="-24781.0">
            <text:p>-24781</text:p>
          </table:table-cell>
          <table:table-cell office:value-type="float" office:value="455859.0">
            <text:p>45585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65.0">
            <text:p>-365</text:p>
          </table:table-cell>
          <table:table-cell office:value-type="float" office:value="-14545.0">
            <text:p>-145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7.0">
            <text:p>1397</text:p>
          </table:table-cell>
          <table:table-cell office:value-type="float" office:value="4496.0">
            <text:p>4496</text:p>
          </table:table-cell>
          <table:table-cell office:value-type="float" office:value="2554.0">
            <text:p>2554</text:p>
          </table:table-cell>
          <table:table-cell office:value-type="float" office:value="-171017.0">
            <text:p>-171017</text:p>
          </table:table-cell>
          <table:table-cell office:value-type="float" office:value="-1757.0">
            <text:p>-1757</text:p>
          </table:table-cell>
          <table:table-cell office:value-type="float" office:value="-157674.0">
            <text:p>-157674</text:p>
          </table:table-cell>
          <table:table-cell office:value-type="float" office:value="1406.0">
            <text:p>1406</text:p>
          </table:table-cell>
          <table:table-cell office:value-type="float" office:value="-279215.0">
            <text:p>-279215</text:p>
          </table:table-cell>
          <table:table-cell office:value-type="float" office:value="10049.0">
            <text:p>10049</text:p>
          </table:table-cell>
          <table:table-cell office:value-type="float" office:value="607906.0">
            <text:p>60790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2708.0">
            <text:p>-2708</text:p>
          </table:table-cell>
          <table:table-cell office:value-type="float" office:value="48851.0">
            <text:p>48851</text:p>
          </table:table-cell>
          <table:table-cell office:value-type="float" office:value="-128.0">
            <text:p>-128</text:p>
          </table:table-cell>
          <table:table-cell office:value-type="float" office:value="-6603.0">
            <text:p>-6603</text:p>
          </table:table-cell>
          <table:table-cell office:value-type="float" office:value="-2369.0">
            <text:p>-2369</text:p>
          </table:table-cell>
          <table:table-cell office:value-type="float" office:value="-2307.0">
            <text:p>-2307</text:p>
          </table:table-cell>
          <table:table-cell office:value-type="float" office:value="561.0">
            <text:p>561</text:p>
          </table:table-cell>
          <table:table-cell office:value-type="float" office:value="-244078.0">
            <text:p>-244078</text:p>
          </table:table-cell>
          <table:table-cell office:value-type="float" office:value="-1435.0">
            <text:p>-1435</text:p>
          </table:table-cell>
          <table:table-cell office:value-type="float" office:value="-136681.0">
            <text:p>-136681</text:p>
          </table:table-cell>
          <table:table-cell office:value-type="float" office:value="-507.0">
            <text:p>-507</text:p>
          </table:table-cell>
          <table:table-cell office:value-type="float" office:value="-338773.0">
            <text:p>-338773</text:p>
          </table:table-cell>
          <table:table-cell office:value-type="float" office:value="-39941.0">
            <text:p>-39941</text:p>
          </table:table-cell>
          <table:table-cell office:value-type="float" office:value="719532.0">
            <text:p>719532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824.0">
            <text:p>824</text:p>
          </table:table-cell>
          <table:table-cell office:value-type="float" office:value="-70316.0">
            <text:p>-70316</text:p>
          </table:table-cell>
          <table:table-cell office:value-type="float" office:value="-150.0">
            <text:p>-150</text:p>
          </table:table-cell>
          <table:table-cell office:value-type="float" office:value="-6543.0">
            <text:p>-6543</text:p>
          </table:table-cell>
          <table:table-cell office:value-type="float" office:value="-154.0">
            <text:p>-154</text:p>
          </table:table-cell>
          <table:table-cell office:value-type="float" office:value="-17665.0">
            <text:p>-17665</text:p>
          </table:table-cell>
          <table:table-cell office:value-type="float" office:value="1385.0">
            <text:p>1385</text:p>
          </table:table-cell>
          <table:table-cell office:value-type="float" office:value="-252729.0">
            <text:p>-252729</text:p>
          </table:table-cell>
          <table:table-cell office:value-type="float" office:value="-1585.0">
            <text:p>-1585</text:p>
          </table:table-cell>
          <table:table-cell office:value-type="float" office:value="-110241.0">
            <text:p>-110241</text:p>
          </table:table-cell>
          <table:table-cell office:value-type="float" office:value="-661.0">
            <text:p>-661</text:p>
          </table:table-cell>
          <table:table-cell office:value-type="float" office:value="-317132.0">
            <text:p>-317132</text:p>
          </table:table-cell>
          <table:table-cell office:value-type="float" office:value="94524.0">
            <text:p>94524</text:p>
          </table:table-cell>
          <table:table-cell office:value-type="float" office:value="680102.0">
            <text:p>680102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2486.0">
            <text:p>2486</text:p>
          </table:table-cell>
          <table:table-cell office:value-type="float" office:value="121174.0">
            <text:p>121174</text:p>
          </table:table-cell>
          <table:table-cell office:value-type="float" office:value="-800.0">
            <text:p>-800</text:p>
          </table:table-cell>
          <table:table-cell office:value-type="float" office:value="-63497.0">
            <text:p>-63497</text:p>
          </table:table-cell>
          <table:table-cell office:value-type="float" office:value="-463.0">
            <text:p>-463</text:p>
          </table:table-cell>
          <table:table-cell office:value-type="float" office:value="-4850.0">
            <text:p>-4850</text:p>
          </table:table-cell>
          <table:table-cell office:value-type="float" office:value="-1490.0">
            <text:p>-1490</text:p>
          </table:table-cell>
          <table:table-cell office:value-type="float" office:value="-282235.0">
            <text:p>-282235</text:p>
          </table:table-cell>
          <table:table-cell office:value-type="float" office:value="-1535.0">
            <text:p>-1535</text:p>
          </table:table-cell>
          <table:table-cell office:value-type="float" office:value="-103222.0">
            <text:p>-103222</text:p>
          </table:table-cell>
          <table:table-cell office:value-type="float" office:value="-641.0">
            <text:p>-641</text:p>
          </table:table-cell>
          <table:table-cell office:value-type="float" office:value="-345818.0">
            <text:p>-345818</text:p>
          </table:table-cell>
          <table:table-cell office:value-type="float" office:value="-52827.0">
            <text:p>-52827</text:p>
          </table:table-cell>
          <table:table-cell office:value-type="float" office:value="731275.0">
            <text:p>731275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4685.0">
            <text:p>4685</text:p>
          </table:table-cell>
          <table:table-cell office:value-type="float" office:value="85187.0">
            <text:p>85187</text:p>
          </table:table-cell>
          <table:table-cell office:value-type="float" office:value="-95.0">
            <text:p>-95</text:p>
          </table:table-cell>
          <table:table-cell office:value-type="float" office:value="-4144.0">
            <text:p>-4144</text:p>
          </table:table-cell>
          <table:table-cell office:value-type="float" office:value="922.0">
            <text:p>922</text:p>
          </table:table-cell>
          <table:table-cell office:value-type="float" office:value="-112.0">
            <text:p>-112</text:p>
          </table:table-cell>
          <table:table-cell office:value-type="float" office:value="3697.0">
            <text:p>3697</text:p>
          </table:table-cell>
          <table:table-cell office:value-type="float" office:value="-173621.0">
            <text:p>-173621</text:p>
          </table:table-cell>
          <table:table-cell office:value-type="float" office:value="-1635.0">
            <text:p>-1635</text:p>
          </table:table-cell>
          <table:table-cell office:value-type="float" office:value="-96105.0">
            <text:p>-96105</text:p>
          </table:table-cell>
          <table:table-cell office:value-type="float" office:value="194.0">
            <text:p>194</text:p>
          </table:table-cell>
          <table:table-cell office:value-type="float" office:value="-334736.0">
            <text:p>-334736</text:p>
          </table:table-cell>
          <table:table-cell office:value-type="float" office:value="-80931.0">
            <text:p>-80931</text:p>
          </table:table-cell>
          <table:table-cell office:value-type="float" office:value="604462.0">
            <text:p>604462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1037.0">
            <text:p>1037</text:p>
          </table:table-cell>
          <table:table-cell office:value-type="float" office:value="-5519.0">
            <text:p>-5519</text:p>
          </table:table-cell>
          <table:table-cell office:value-type="float" office:value="-100.0">
            <text:p>-100</text:p>
          </table:table-cell>
          <table:table-cell office:value-type="float" office:value="-3727.0">
            <text:p>-3727</text:p>
          </table:table-cell>
          <table:table-cell office:value-type="float" office:value="486.0">
            <text:p>486</text:p>
          </table:table-cell>
          <table:table-cell office:value-type="float" office:value="-2686.0">
            <text:p>-2686</text:p>
          </table:table-cell>
          <table:table-cell office:value-type="float" office:value="4734.0">
            <text:p>4734</text:p>
          </table:table-cell>
          <table:table-cell office:value-type="float" office:value="-90263.0">
            <text:p>-90263</text:p>
          </table:table-cell>
          <table:table-cell office:value-type="float" office:value="-1735.0">
            <text:p>-1735</text:p>
          </table:table-cell>
          <table:table-cell office:value-type="float" office:value="-43705.0">
            <text:p>-43705</text:p>
          </table:table-cell>
          <table:table-cell office:value-type="float" office:value="680.0">
            <text:p>680</text:p>
          </table:table-cell>
          <table:table-cell office:value-type="float" office:value="-267453.0">
            <text:p>-267453</text:p>
          </table:table-cell>
          <table:table-cell office:value-type="float" office:value="11932.0">
            <text:p>11932</text:p>
          </table:table-cell>
          <table:table-cell office:value-type="float" office:value="401421.0">
            <text:p>401421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7815.0">
            <text:p>-17815</text:p>
          </table:table-cell>
          <table:table-cell office:value-type="float" office:value="81102.0">
            <text:p>81102</text:p>
          </table:table-cell>
          <table:table-cell office:value-type="float" office:value="-600.0">
            <text:p>-600</text:p>
          </table:table-cell>
          <table:table-cell office:value-type="float" office:value="-50693.0">
            <text:p>-50693</text:p>
          </table:table-cell>
          <table:table-cell office:value-type="float" office:value="-1063.0">
            <text:p>-1063</text:p>
          </table:table-cell>
          <table:table-cell office:value-type="float" office:value="-24349.0">
            <text:p>-24349</text:p>
          </table:table-cell>
          <table:table-cell office:value-type="float" office:value="2643.0">
            <text:p>2643</text:p>
          </table:table-cell>
          <table:table-cell office:value-type="float" office:value="2231.0">
            <text:p>2231</text:p>
          </table:table-cell>
          <table:table-cell office:value-type="float" office:value="-1685.0">
            <text:p>-1685</text:p>
          </table:table-cell>
          <table:table-cell office:value-type="float" office:value="-77569.0">
            <text:p>-77569</text:p>
          </table:table-cell>
          <table:table-cell office:value-type="float" office:value="599.0">
            <text:p>599</text:p>
          </table:table-cell>
          <table:table-cell office:value-type="float" office:value="-258779.0">
            <text:p>-258779</text:p>
          </table:table-cell>
          <table:table-cell office:value-type="float" office:value="-6060.0">
            <text:p>-6060</text:p>
          </table:table-cell>
          <table:table-cell office:value-type="float" office:value="334117.0">
            <text:p>334117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6526.0">
            <text:p>6526</text:p>
          </table:table-cell>
          <table:table-cell office:value-type="float" office:value="69288.0">
            <text:p>69288</text:p>
          </table:table-cell>
          <table:table-cell office:value-type="float" office:value="-27.0">
            <text:p>-27</text:p>
          </table:table-cell>
          <table:table-cell office:value-type="float" office:value="-14591.0">
            <text:p>-14591</text:p>
          </table:table-cell>
          <table:table-cell office:value-type="float" office:value="-406.0">
            <text:p>-406</text:p>
          </table:table-cell>
          <table:table-cell office:value-type="float" office:value="-29305.0">
            <text:p>-29305</text:p>
          </table:table-cell>
          <table:table-cell office:value-type="float" office:value="9169.0">
            <text:p>9169</text:p>
          </table:table-cell>
          <table:table-cell office:value-type="float" office:value="72256.0">
            <text:p>72256</text:p>
          </table:table-cell>
          <table:table-cell office:value-type="float" office:value="-1712.0">
            <text:p>-1712</text:p>
          </table:table-cell>
          <table:table-cell office:value-type="float" office:value="-85587.0">
            <text:p>-85587</text:p>
          </table:table-cell>
          <table:table-cell office:value-type="float" office:value="193.0">
            <text:p>193</text:p>
          </table:table-cell>
          <table:table-cell office:value-type="float" office:value="-280448.0">
            <text:p>-280448</text:p>
          </table:table-cell>
          <table:table-cell office:value-type="float" office:value="-25392.0">
            <text:p>-25392</text:p>
          </table:table-cell>
          <table:table-cell office:value-type="float" office:value="293779.0">
            <text:p>293779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2745.0">
            <text:p>-2745</text:p>
          </table:table-cell>
          <table:table-cell office:value-type="float" office:value="62141.0">
            <text:p>62141</text:p>
          </table:table-cell>
          <table:table-cell office:value-type="float" office:value="-430.0">
            <text:p>-430</text:p>
          </table:table-cell>
          <table:table-cell office:value-type="float" office:value="-32023.0">
            <text:p>-32023</text:p>
          </table:table-cell>
          <table:table-cell office:value-type="float" office:value="698.0">
            <text:p>698</text:p>
          </table:table-cell>
          <table:table-cell office:value-type="float" office:value="-1160.0">
            <text:p>-1160</text:p>
          </table:table-cell>
          <table:table-cell office:value-type="float" office:value="7005.0">
            <text:p>7005</text:p>
          </table:table-cell>
          <table:table-cell office:value-type="float" office:value="64351.0">
            <text:p>64351</text:p>
          </table:table-cell>
          <table:table-cell office:value-type="float" office:value="-1652.0">
            <text:p>-1652</text:p>
          </table:table-cell>
          <table:table-cell office:value-type="float" office:value="-76558.0">
            <text:p>-76558</text:p>
          </table:table-cell>
          <table:table-cell office:value-type="float" office:value="1159.0">
            <text:p>1159</text:p>
          </table:table-cell>
          <table:table-cell office:value-type="float" office:value="-261487.0">
            <text:p>-261487</text:p>
          </table:table-cell>
          <table:table-cell office:value-type="float" office:value="-28958.0">
            <text:p>-28958</text:p>
          </table:table-cell>
          <table:table-cell office:value-type="float" office:value="273694.0">
            <text:p>273694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5429.0">
            <text:p>5429</text:p>
          </table:table-cell>
          <table:table-cell office:value-type="float" office:value="20418.0">
            <text:p>20418</text:p>
          </table:table-cell>
          <table:table-cell office:value-type="float" office:value="10.0">
            <text:p>10</text:p>
          </table:table-cell>
          <table:table-cell office:value-type="float" office:value="-38214.0">
            <text:p>-38214</text:p>
          </table:table-cell>
          <table:table-cell office:value-type="float" office:value="1174.0">
            <text:p>1174</text:p>
          </table:table-cell>
          <table:table-cell office:value-type="float" office:value="1809.0">
            <text:p>1809</text:p>
          </table:table-cell>
          <table:table-cell office:value-type="float" office:value="12434.0">
            <text:p>12434</text:p>
          </table:table-cell>
          <table:table-cell office:value-type="float" office:value="95126.0">
            <text:p>95126</text:p>
          </table:table-cell>
          <table:table-cell office:value-type="float" office:value="-1642.0">
            <text:p>-1642</text:p>
          </table:table-cell>
          <table:table-cell office:value-type="float" office:value="-84727.0">
            <text:p>-84727</text:p>
          </table:table-cell>
          <table:table-cell office:value-type="float" office:value="2333.0">
            <text:p>2333</text:p>
          </table:table-cell>
          <table:table-cell office:value-type="float" office:value="-201708.0">
            <text:p>-201708</text:p>
          </table:table-cell>
          <table:table-cell office:value-type="float" office:value="15987.0">
            <text:p>15987</text:p>
          </table:table-cell>
          <table:table-cell office:value-type="float" office:value="191309.0">
            <text:p>191309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3103.0">
            <text:p>-3103</text:p>
          </table:table-cell>
          <table:table-cell office:value-type="float" office:value="158770.0">
            <text:p>158770</text:p>
          </table:table-cell>
          <table:table-cell office:value-type="float" office:value="-959.0">
            <text:p>-959</text:p>
          </table:table-cell>
          <table:table-cell office:value-type="float" office:value="-62904.0">
            <text:p>-62904</text:p>
          </table:table-cell>
          <table:table-cell office:value-type="float" office:value="-528.0">
            <text:p>-528</text:p>
          </table:table-cell>
          <table:table-cell office:value-type="float" office:value="-49315.0">
            <text:p>-49315</text:p>
          </table:table-cell>
          <table:table-cell office:value-type="float" office:value="10362.0">
            <text:p>10362</text:p>
          </table:table-cell>
          <table:table-cell office:value-type="float" office:value="385219.0">
            <text:p>385219</text:p>
          </table:table-cell>
          <table:table-cell office:value-type="float" office:value="-1323.0">
            <text:p>-1323</text:p>
          </table:table-cell>
          <table:table-cell office:value-type="float" office:value="-74867.0">
            <text:p>-74867</text:p>
          </table:table-cell>
          <table:table-cell office:value-type="float" office:value="-1620.0">
            <text:p>-1620</text:p>
          </table:table-cell>
          <table:table-cell office:value-type="float" office:value="-197741.0">
            <text:p>-197741</text:p>
          </table:table-cell>
          <table:table-cell office:value-type="float" office:value="-46551.0">
            <text:p>-46551</text:p>
          </table:table-cell>
          <table:table-cell office:value-type="float" office:value="-112611.0">
            <text:p>-112611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3195.0">
            <text:p>3195</text:p>
          </table:table-cell>
          <table:table-cell office:value-type="float" office:value="1462.0">
            <text:p>146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14.0">
            <text:p>2214</text:p>
          </table:table-cell>
          <table:table-cell office:value-type="float" office:value="17481.0">
            <text:p>17481</text:p>
          </table:table-cell>
          <table:table-cell office:value-type="float" office:value="3752.0">
            <text:p>3752</text:p>
          </table:table-cell>
          <table:table-cell office:value-type="float" office:value="17625.0">
            <text:p>17625</text:p>
          </table:table-cell>
          <table:table-cell office:value-type="float" office:value="87.0">
            <text:p>87</text:p>
          </table:table-cell>
          <table:table-cell office:value-type="float" office:value="994.0">
            <text:p>994</text:p>
          </table:table-cell>
          <table:table-cell office:value-type="float" office:value="6772.0">
            <text:p>6772</text:p>
          </table:table-cell>
          <table:table-cell office:value-type="float" office:value="75534.0">
            <text:p>75534</text:p>
          </table:table-cell>
          <table:table-cell office:value-type="float" office:value="-18943.0">
            <text:p>-18943</text:p>
          </table:table-cell>
          <table:table-cell office:value-type="float" office:value="-94153.0">
            <text:p>-9415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8612.0">
            <text:p>-8612</text:p>
          </table:table-cell>
          <table:table-cell office:value-type="float" office:value="39648.0">
            <text:p>39648</text:p>
          </table:table-cell>
          <table:table-cell office:value-type="float" office:value="10.0">
            <text:p>10</text:p>
          </table:table-cell>
          <table:table-cell office:value-type="float" office:value="49.0">
            <text:p>49</text:p>
          </table:table-cell>
          <table:table-cell office:value-type="float" office:value="-366.0">
            <text:p>-366</text:p>
          </table:table-cell>
          <table:table-cell office:value-type="float" office:value="25251.0">
            <text:p>25251</text:p>
          </table:table-cell>
          <table:table-cell office:value-type="float" office:value="5850.0">
            <text:p>5850</text:p>
          </table:table-cell>
          <table:table-cell office:value-type="float" office:value="31128.0">
            <text:p>31128</text:p>
          </table:table-cell>
          <table:table-cell office:value-type="float" office:value="87.0">
            <text:p>87</text:p>
          </table:table-cell>
          <table:table-cell office:value-type="float" office:value="1396.0">
            <text:p>1396</text:p>
          </table:table-cell>
          <table:table-cell office:value-type="float" office:value="3981.0">
            <text:p>3981</text:p>
          </table:table-cell>
          <table:table-cell office:value-type="float" office:value="98292.0">
            <text:p>98292</text:p>
          </table:table-cell>
          <table:table-cell office:value-type="float" office:value="-64948.0">
            <text:p>-64948</text:p>
          </table:table-cell>
          <table:table-cell office:value-type="float" office:value="-130816.0">
            <text:p>-13081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147.0">
            <text:p>-147</text:p>
          </table:table-cell>
          <table:table-cell office:value-type="float" office:value="2745.0">
            <text:p>27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65.0">
            <text:p>-65</text:p>
          </table:table-cell>
          <table:table-cell office:value-type="float" office:value="-22068.0">
            <text:p>-22068</text:p>
          </table:table-cell>
          <table:table-cell office:value-type="float" office:value="5703.0">
            <text:p>5703</text:p>
          </table:table-cell>
          <table:table-cell office:value-type="float" office:value="29719.0">
            <text:p>29719</text:p>
          </table:table-cell>
          <table:table-cell office:value-type="float" office:value="87.0">
            <text:p>87</text:p>
          </table:table-cell>
          <table:table-cell office:value-type="float" office:value="1229.0">
            <text:p>1229</text:p>
          </table:table-cell>
          <table:table-cell office:value-type="float" office:value="3916.0">
            <text:p>3916</text:p>
          </table:table-cell>
          <table:table-cell office:value-type="float" office:value="71856.0">
            <text:p>71856</text:p>
          </table:table-cell>
          <table:table-cell office:value-type="float" office:value="19323.0">
            <text:p>19323</text:p>
          </table:table-cell>
          <table:table-cell office:value-type="float" office:value="-102804.0">
            <text:p>-1028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7929.0">
            <text:p>-7929</text:p>
          </table:table-cell>
          <table:table-cell office:value-type="float" office:value="-15130.0">
            <text:p>-15130</text:p>
          </table:table-cell>
          <table:table-cell office:value-type="float" office:value="100.0">
            <text:p>100</text:p>
          </table:table-cell>
          <table:table-cell office:value-type="float" office:value="123.0">
            <text:p>123</text:p>
          </table:table-cell>
          <table:table-cell office:value-type="float" office:value="1305.0">
            <text:p>1305</text:p>
          </table:table-cell>
          <table:table-cell office:value-type="float" office:value="49249.0">
            <text:p>49249</text:p>
          </table:table-cell>
          <table:table-cell office:value-type="float" office:value="2196.0">
            <text:p>2196</text:p>
          </table:table-cell>
          <table:table-cell office:value-type="float" office:value="10091.0">
            <text:p>10091</text:p>
          </table:table-cell>
          <table:table-cell office:value-type="float" office:value="87.0">
            <text:p>87</text:p>
          </table:table-cell>
          <table:table-cell office:value-type="float" office:value="2624.0">
            <text:p>2624</text:p>
          </table:table-cell>
          <table:table-cell office:value-type="float" office:value="4512.0">
            <text:p>4512</text:p>
          </table:table-cell>
          <table:table-cell office:value-type="float" office:value="152659.0">
            <text:p>152659</text:p>
          </table:table-cell>
          <table:table-cell office:value-type="float" office:value="-34242.0">
            <text:p>-34242</text:p>
          </table:table-cell>
          <table:table-cell office:value-type="float" office:value="-165374.0">
            <text:p>-165374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3416.0">
            <text:p>3416</text:p>
          </table:table-cell>
          <table:table-cell office:value-type="float" office:value="25480.0">
            <text:p>25480</text:p>
          </table:table-cell>
          <table:table-cell office:value-type="float" office:value="30.0">
            <text:p>30</text:p>
          </table:table-cell>
          <table:table-cell office:value-type="float" office:value="340.0">
            <text:p>340</text:p>
          </table:table-cell>
          <table:table-cell office:value-type="float" office:value="-292.0">
            <text:p>-292</text:p>
          </table:table-cell>
          <table:table-cell office:value-type="float" office:value="-33575.0">
            <text:p>-33575</text:p>
          </table:table-cell>
          <table:table-cell office:value-type="float" office:value="5612.0">
            <text:p>5612</text:p>
          </table:table-cell>
          <table:table-cell office:value-type="float" office:value="25018.0">
            <text:p>25018</text:p>
          </table:table-cell>
          <table:table-cell office:value-type="float" office:value="117.0">
            <text:p>117</text:p>
          </table:table-cell>
          <table:table-cell office:value-type="float" office:value="1429.0">
            <text:p>1429</text:p>
          </table:table-cell>
          <table:table-cell office:value-type="float" office:value="4220.0">
            <text:p>4220</text:p>
          </table:table-cell>
          <table:table-cell office:value-type="float" office:value="73552.0">
            <text:p>73552</text:p>
          </table:table-cell>
          <table:table-cell office:value-type="float" office:value="7755.0">
            <text:p>7755</text:p>
          </table:table-cell>
          <table:table-cell office:value-type="float" office:value="-99999.0">
            <text:p>-9999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07.0">
            <text:p>107</text:p>
          </table:table-cell>
          <table:table-cell office:value-type="float" office:value="59631.0">
            <text:p>596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-4425.0">
            <text:p>-4425</text:p>
          </table:table-cell>
          <table:table-cell office:value-type="float" office:value="5719.0">
            <text:p>5719</text:p>
          </table:table-cell>
          <table:table-cell office:value-type="float" office:value="65915.0">
            <text:p>65915</text:p>
          </table:table-cell>
          <table:table-cell office:value-type="float" office:value="117.0">
            <text:p>117</text:p>
          </table:table-cell>
          <table:table-cell office:value-type="float" office:value="719.0">
            <text:p>719</text:p>
          </table:table-cell>
          <table:table-cell office:value-type="float" office:value="5759.0">
            <text:p>5759</text:p>
          </table:table-cell>
          <table:table-cell office:value-type="float" office:value="69476.0">
            <text:p>69476</text:p>
          </table:table-cell>
          <table:table-cell office:value-type="float" office:value="-55206.0">
            <text:p>-55206</text:p>
          </table:table-cell>
          <table:table-cell office:value-type="float" office:value="-136110.0">
            <text:p>-136110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13714.0">
            <text:p>-13714</text:p>
          </table:table-cell>
          <table:table-cell office:value-type="float" office:value="-54877.0">
            <text:p>-54877</text:p>
          </table:table-cell>
          <table:table-cell office:value-type="float" office:value="80.0">
            <text:p>80</text:p>
          </table:table-cell>
          <table:table-cell office:value-type="float" office:value="138.0">
            <text:p>138</text:p>
          </table:table-cell>
          <table:table-cell office:value-type="float" office:value="243.0">
            <text:p>243</text:p>
          </table:table-cell>
          <table:table-cell office:value-type="float" office:value="-9177.0">
            <text:p>-9177</text:p>
          </table:table-cell>
          <table:table-cell office:value-type="float" office:value="2194.0">
            <text:p>2194</text:p>
          </table:table-cell>
          <table:table-cell office:value-type="float" office:value="20251.0">
            <text:p>20251</text:p>
          </table:table-cell>
          <table:table-cell office:value-type="float" office:value="87.0">
            <text:p>87</text:p>
          </table:table-cell>
          <table:table-cell office:value-type="float" office:value="547.0">
            <text:p>547</text:p>
          </table:table-cell>
          <table:table-cell office:value-type="float" office:value="4775.0">
            <text:p>4775</text:p>
          </table:table-cell>
          <table:table-cell office:value-type="float" office:value="82015.0">
            <text:p>82015</text:p>
          </table:table-cell>
          <table:table-cell office:value-type="float" office:value="63916.0">
            <text:p>63916</text:p>
          </table:table-cell>
          <table:table-cell office:value-type="float" office:value="-102813.0">
            <text:p>-102813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5905.0">
            <text:p>5905</text:p>
          </table:table-cell>
          <table:table-cell office:value-type="float" office:value="31396.0">
            <text:p>313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05.0">
            <text:p>805</text:p>
          </table:table-cell>
          <table:table-cell office:value-type="float" office:value="10353.0">
            <text:p>10353</text:p>
          </table:table-cell>
          <table:table-cell office:value-type="float" office:value="8099.0">
            <text:p>8099</text:p>
          </table:table-cell>
          <table:table-cell office:value-type="float" office:value="49093.0">
            <text:p>49093</text:p>
          </table:table-cell>
          <table:table-cell office:value-type="float" office:value="87.0">
            <text:p>87</text:p>
          </table:table-cell>
          <table:table-cell office:value-type="float" office:value="527.0">
            <text:p>527</text:p>
          </table:table-cell>
          <table:table-cell office:value-type="float" office:value="5580.0">
            <text:p>5580</text:p>
          </table:table-cell>
          <table:table-cell office:value-type="float" office:value="92619.0">
            <text:p>92619</text:p>
          </table:table-cell>
          <table:table-cell office:value-type="float" office:value="-41749.0">
            <text:p>-41749</text:p>
          </table:table-cell>
          <table:table-cell office:value-type="float" office:value="-142239.0">
            <text:p>-142239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10976.0">
            <text:p>-10976</text:p>
          </table:table-cell>
          <table:table-cell office:value-type="float" office:value="-10434.0">
            <text:p>-10434</text:p>
          </table:table-cell>
          <table:table-cell office:value-type="float" office:value="100.0">
            <text:p>100</text:p>
          </table:table-cell>
          <table:table-cell office:value-type="float" office:value="41.0">
            <text:p>41</text:p>
          </table:table-cell>
          <table:table-cell office:value-type="float" office:value="-2032.0">
            <text:p>-2032</text:p>
          </table:table-cell>
          <table:table-cell office:value-type="float" office:value="-9828.0">
            <text:p>-9828</text:p>
          </table:table-cell>
          <table:table-cell office:value-type="float" office:value="2714.0">
            <text:p>2714</text:p>
          </table:table-cell>
          <table:table-cell office:value-type="float" office:value="26264.0">
            <text:p>26264</text:p>
          </table:table-cell>
          <table:table-cell office:value-type="float" office:value="87.0">
            <text:p>87</text:p>
          </table:table-cell>
          <table:table-cell office:value-type="float" office:value="384.0">
            <text:p>384</text:p>
          </table:table-cell>
          <table:table-cell office:value-type="float" office:value="6123.0">
            <text:p>6123</text:p>
          </table:table-cell>
          <table:table-cell office:value-type="float" office:value="86773.0">
            <text:p>86773</text:p>
          </table:table-cell>
          <table:table-cell office:value-type="float" office:value="20221.0">
            <text:p>20221</text:p>
          </table:table-cell>
          <table:table-cell office:value-type="float" office:value="-113421.0">
            <text:p>-113421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485.0">
            <text:p>2485</text:p>
          </table:table-cell>
          <table:table-cell office:value-type="float" office:value="-32205.0">
            <text:p>-3220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2.0">
            <text:p>1532</text:p>
          </table:table-cell>
          <table:table-cell office:value-type="float" office:value="21680.0">
            <text:p>21680</text:p>
          </table:table-cell>
          <table:table-cell office:value-type="float" office:value="7127.0">
            <text:p>7127</text:p>
          </table:table-cell>
          <table:table-cell office:value-type="float" office:value="26871.0">
            <text:p>26871</text:p>
          </table:table-cell>
          <table:table-cell office:value-type="float" office:value="87.0">
            <text:p>87</text:p>
          </table:table-cell>
          <table:table-cell office:value-type="float" office:value="299.0">
            <text:p>299</text:p>
          </table:table-cell>
          <table:table-cell office:value-type="float" office:value="7720.0">
            <text:p>7720</text:p>
          </table:table-cell>
          <table:table-cell office:value-type="float" office:value="101103.0">
            <text:p>101103</text:p>
          </table:table-cell>
          <table:table-cell office:value-type="float" office:value="10525.0">
            <text:p>10525</text:p>
          </table:table-cell>
          <table:table-cell office:value-type="float" office:value="-128273.0">
            <text:p>-12827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2291.0">
            <text:p>-2291</text:p>
          </table:table-cell>
          <table:table-cell office:value-type="float" office:value="-23184.0">
            <text:p>-2318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73.0">
            <text:p>2473</text:p>
          </table:table-cell>
          <table:table-cell office:value-type="float" office:value="23576.0">
            <text:p>23576</text:p>
          </table:table-cell>
          <table:table-cell office:value-type="float" office:value="4836.0">
            <text:p>4836</text:p>
          </table:table-cell>
          <table:table-cell office:value-type="float" office:value="3652.0">
            <text:p>3652</text:p>
          </table:table-cell>
          <table:table-cell office:value-type="float" office:value="87.0">
            <text:p>87</text:p>
          </table:table-cell>
          <table:table-cell office:value-type="float" office:value="562.0">
            <text:p>562</text:p>
          </table:table-cell>
          <table:table-cell office:value-type="float" office:value="10193.0">
            <text:p>10193</text:p>
          </table:table-cell>
          <table:table-cell office:value-type="float" office:value="165920.0">
            <text:p>165920</text:p>
          </table:table-cell>
          <table:table-cell office:value-type="float" office:value="-392.0">
            <text:p>-392</text:p>
          </table:table-cell>
          <table:table-cell office:value-type="float" office:value="-170134.0">
            <text:p>-170134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464.0">
            <text:p>-1464</text:p>
          </table:table-cell>
          <table:table-cell office:value-type="float" office:value="-3474.0">
            <text:p>-3474</text:p>
          </table:table-cell>
          <table:table-cell office:value-type="float" office:value="80.0">
            <text:p>80</text:p>
          </table:table-cell>
          <table:table-cell office:value-type="float" office:value="278.0">
            <text:p>278</text:p>
          </table:table-cell>
          <table:table-cell office:value-type="float" office:value="-1967.0">
            <text:p>-1967</text:p>
          </table:table-cell>
          <table:table-cell office:value-type="float" office:value="-8523.0">
            <text:p>-8523</text:p>
          </table:table-cell>
          <table:table-cell office:value-type="float" office:value="5300.0">
            <text:p>5300</text:p>
          </table:table-cell>
          <table:table-cell office:value-type="float" office:value="-37571.0">
            <text:p>-37571</text:p>
          </table:table-cell>
          <table:table-cell office:value-type="float" office:value="87.0">
            <text:p>87</text:p>
          </table:table-cell>
          <table:table-cell office:value-type="float" office:value="432.0">
            <text:p>432</text:p>
          </table:table-cell>
          <table:table-cell office:value-type="float" office:value="6836.0">
            <text:p>6836</text:p>
          </table:table-cell>
          <table:table-cell office:value-type="float" office:value="132434.0">
            <text:p>132434</text:p>
          </table:table-cell>
          <table:table-cell office:value-type="float" office:value="11719.0">
            <text:p>11719</text:p>
          </table:table-cell>
          <table:table-cell office:value-type="float" office:value="-95295.0">
            <text:p>-95295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2714.0">
            <text:p>2714</text:p>
          </table:table-cell>
          <table:table-cell office:value-type="float" office:value="-10139.0">
            <text:p>-10139</text:p>
          </table:table-cell>
          <table:table-cell office:value-type="float" office:value="120.0">
            <text:p>120</text:p>
          </table:table-cell>
          <table:table-cell office:value-type="float" office:value="587.0">
            <text:p>587</text:p>
          </table:table-cell>
          <table:table-cell office:value-type="float" office:value="2892.0">
            <text:p>2892</text:p>
          </table:table-cell>
          <table:table-cell office:value-type="float" office:value="10340.0">
            <text:p>10340</text:p>
          </table:table-cell>
          <table:table-cell office:value-type="float" office:value="8014.0">
            <text:p>8014</text:p>
          </table:table-cell>
          <table:table-cell office:value-type="float" office:value="-31429.0">
            <text:p>-31429</text:p>
          </table:table-cell>
          <table:table-cell office:value-type="float" office:value="207.0">
            <text:p>207</text:p>
          </table:table-cell>
          <table:table-cell office:value-type="float" office:value="846.0">
            <text:p>846</text:p>
          </table:table-cell>
          <table:table-cell office:value-type="float" office:value="9728.0">
            <text:p>9728</text:p>
          </table:table-cell>
          <table:table-cell office:value-type="float" office:value="134438.0">
            <text:p>134438</text:p>
          </table:table-cell>
          <table:table-cell office:value-type="float" office:value="-788.0">
            <text:p>-788</text:p>
          </table:table-cell>
          <table:table-cell office:value-type="float" office:value="-103855.0">
            <text:p>-103855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5261.0">
            <text:p>-5261</text:p>
          </table:table-cell>
          <table:table-cell office:value-type="float" office:value="-23783.0">
            <text:p>-237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44.0">
            <text:p>2044</text:p>
          </table:table-cell>
          <table:table-cell office:value-type="float" office:value="4865.0">
            <text:p>4865</text:p>
          </table:table-cell>
          <table:table-cell office:value-type="float" office:value="275.0">
            <text:p>275</text:p>
          </table:table-cell>
          <table:table-cell office:value-type="float" office:value="-46671.0">
            <text:p>-46671</text:p>
          </table:table-cell>
          <table:table-cell office:value-type="float" office:value="87.0">
            <text:p>87</text:p>
          </table:table-cell>
          <table:table-cell office:value-type="float" office:value="116.0">
            <text:p>116</text:p>
          </table:table-cell>
          <table:table-cell office:value-type="float" office:value="9703.0">
            <text:p>9703</text:p>
          </table:table-cell>
          <table:table-cell office:value-type="float" office:value="107022.0">
            <text:p>107022</text:p>
          </table:table-cell>
          <table:table-cell office:value-type="float" office:value="18918.0">
            <text:p>18918</text:p>
          </table:table-cell>
          <table:table-cell office:value-type="float" office:value="-60467.0">
            <text:p>-60467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6806.0">
            <text:p>6806</text:p>
          </table:table-cell>
          <table:table-cell office:value-type="float" office:value="113678.0">
            <text:p>113678</text:p>
          </table:table-cell>
          <table:table-cell office:value-type="float" office:value="78.0">
            <text:p>78</text:p>
          </table:table-cell>
          <table:table-cell office:value-type="float" office:value="747.0">
            <text:p>747</text:p>
          </table:table-cell>
          <table:table-cell office:value-type="float" office:value="3498.0">
            <text:p>3498</text:p>
          </table:table-cell>
          <table:table-cell office:value-type="float" office:value="3594.0">
            <text:p>3594</text:p>
          </table:table-cell>
          <table:table-cell office:value-type="float" office:value="7081.0">
            <text:p>7081</text:p>
          </table:table-cell>
          <table:table-cell office:value-type="float" office:value="16906.0">
            <text:p>16906</text:p>
          </table:table-cell>
          <table:table-cell office:value-type="float" office:value="165.0">
            <text:p>165</text:p>
          </table:table-cell>
          <table:table-cell office:value-type="float" office:value="577.0">
            <text:p>577</text:p>
          </table:table-cell>
          <table:table-cell office:value-type="float" office:value="13201.0">
            <text:p>13201</text:p>
          </table:table-cell>
          <table:table-cell office:value-type="float" office:value="129029.0">
            <text:p>129029</text:p>
          </table:table-cell>
          <table:table-cell office:value-type="float" office:value="-118019.0">
            <text:p>-118019</text:p>
          </table:table-cell>
          <table:table-cell office:value-type="float" office:value="-146512.0">
            <text:p>-146512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14930.0">
            <text:p>-14930</text:p>
          </table:table-cell>
          <table:table-cell office:value-type="float" office:value="-5598.0">
            <text:p>-5598</text:p>
          </table:table-cell>
          <table:table-cell office:value-type="float" office:value="6.0">
            <text:p>6</text:p>
          </table:table-cell>
          <table:table-cell office:value-type="float" office:value="411.0">
            <text:p>411</text:p>
          </table:table-cell>
          <table:table-cell office:value-type="float" office:value="-4601.0">
            <text:p>-4601</text:p>
          </table:table-cell>
          <table:table-cell office:value-type="float" office:value="-40900.0">
            <text:p>-40900</text:p>
          </table:table-cell>
          <table:table-cell office:value-type="float" office:value="4992.0">
            <text:p>4992</text:p>
          </table:table-cell>
          <table:table-cell office:value-type="float" office:value="2612.0">
            <text:p>2612</text:p>
          </table:table-cell>
          <table:table-cell office:value-type="float" office:value="6.0">
            <text:p>6</text:p>
          </table:table-cell>
          <table:table-cell office:value-type="float" office:value="366.0">
            <text:p>366</text:p>
          </table:table-cell>
          <table:table-cell office:value-type="float" office:value="3139.0">
            <text:p>3139</text:p>
          </table:table-cell>
          <table:table-cell office:value-type="float" office:value="70673.0">
            <text:p>70673</text:p>
          </table:table-cell>
          <table:table-cell office:value-type="float" office:value="46087.0">
            <text:p>46087</text:p>
          </table:table-cell>
          <table:table-cell office:value-type="float" office:value="-73651.0">
            <text:p>-73651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930.0">
            <text:p>930</text:p>
          </table:table-cell>
          <table:table-cell office:value-type="float" office:value="8834773.0">
            <text:p>883477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3277.0">
            <text:p>3277</text:p>
          </table:table-cell>
          <table:table-cell office:value-type="float" office:value="30437465.0">
            <text:p>30437465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3003.0">
            <text:p>3003</text:p>
          </table:table-cell>
          <table:table-cell office:value-type="float" office:value="27967604.0">
            <text:p>279676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4641.0">
            <text:p>4641</text:p>
          </table:table-cell>
          <table:table-cell office:value-type="float" office:value="41279878.0">
            <text:p>41279878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2415.0">
            <text:p>2415</text:p>
          </table:table-cell>
          <table:table-cell office:value-type="float" office:value="22032669.0">
            <text:p>2203266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571.0">
            <text:p>1571</text:p>
          </table:table-cell>
          <table:table-cell office:value-type="float" office:value="14723626.0">
            <text:p>1472362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1592.0">
            <text:p>1592</text:p>
          </table:table-cell>
          <table:table-cell office:value-type="float" office:value="15070428.0">
            <text:p>15070428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3683.0">
            <text:p>3683</text:p>
          </table:table-cell>
          <table:table-cell office:value-type="float" office:value="34363431.0">
            <text:p>34363431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3071.0">
            <text:p>3071</text:p>
          </table:table-cell>
          <table:table-cell office:value-type="float" office:value="28899737.0">
            <text:p>28899737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670.0">
            <text:p>2670</text:p>
          </table:table-cell>
          <table:table-cell office:value-type="float" office:value="25075033.0">
            <text:p>2507503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3793.0">
            <text:p>3793</text:p>
          </table:table-cell>
          <table:table-cell office:value-type="float" office:value="34733609.0">
            <text:p>34733609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3311.0">
            <text:p>3311</text:p>
          </table:table-cell>
          <table:table-cell office:value-type="float" office:value="30234903.0">
            <text:p>30234903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2243.0">
            <text:p>2243</text:p>
          </table:table-cell>
          <table:table-cell office:value-type="float" office:value="20526530.0">
            <text:p>20526530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1270.0">
            <text:p>1270</text:p>
          </table:table-cell>
          <table:table-cell office:value-type="float" office:value="11538103.0">
            <text:p>11538103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2352.0">
            <text:p>2352</text:p>
          </table:table-cell>
          <table:table-cell office:value-type="float" office:value="21112288.0">
            <text:p>21112288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664.0">
            <text:p>-664</text:p>
          </table:table-cell>
          <table:table-cell office:value-type="float" office:value="-6103921.0">
            <text:p>-6103921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