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7514.0">
            <text:p>7514</text:p>
          </table:table-cell>
          <table:table-cell office:value-type="float" office:value="71712.0">
            <text:p>71712</text:p>
          </table:table-cell>
          <table:table-cell office:value-type="float" office:value="-717.0">
            <text:p>-717</text:p>
          </table:table-cell>
          <table:table-cell office:value-type="float" office:value="-27758.0">
            <text:p>-27758</text:p>
          </table:table-cell>
          <table:table-cell office:value-type="float" office:value="1865.0">
            <text:p>1865</text:p>
          </table:table-cell>
          <table:table-cell office:value-type="float" office:value="22820.0">
            <text:p>22820</text:p>
          </table:table-cell>
          <table:table-cell office:value-type="float" office:value="8741.0">
            <text:p>8741</text:p>
          </table:table-cell>
          <table:table-cell office:value-type="float" office:value="-731345.0">
            <text:p>-731345</text:p>
          </table:table-cell>
          <table:table-cell office:value-type="float" office:value="-1335.0">
            <text:p>-1335</text:p>
          </table:table-cell>
          <table:table-cell office:value-type="float" office:value="-122026.0">
            <text:p>-122026</text:p>
          </table:table-cell>
          <table:table-cell office:value-type="float" office:value="4377.0">
            <text:p>4377</text:p>
          </table:table-cell>
          <table:table-cell office:value-type="float" office:value="536279.0">
            <text:p>536279</text:p>
          </table:table-cell>
          <table:table-cell office:value-type="float" office:value="-66774.0">
            <text:p>-66774</text:p>
          </table:table-cell>
          <table:table-cell office:value-type="float" office:value="317092.0">
            <text:p>317092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20287.0">
            <text:p>-20287</text:p>
          </table:table-cell>
          <table:table-cell office:value-type="float" office:value="52131.0">
            <text:p>52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312.0">
            <text:p>-4312</text:p>
          </table:table-cell>
          <table:table-cell office:value-type="float" office:value="-87448.0">
            <text:p>-87448</text:p>
          </table:table-cell>
          <table:table-cell office:value-type="float" office:value="2885.0">
            <text:p>2885</text:p>
          </table:table-cell>
          <table:table-cell office:value-type="float" office:value="-623035.0">
            <text:p>-623035</text:p>
          </table:table-cell>
          <table:table-cell office:value-type="float" office:value="-835.0">
            <text:p>-835</text:p>
          </table:table-cell>
          <table:table-cell office:value-type="float" office:value="-63079.0">
            <text:p>-63079</text:p>
          </table:table-cell>
          <table:table-cell office:value-type="float" office:value="2935.0">
            <text:p>2935</text:p>
          </table:table-cell>
          <table:table-cell office:value-type="float" office:value="413757.0">
            <text:p>413757</text:p>
          </table:table-cell>
          <table:table-cell office:value-type="float" office:value="35317.0">
            <text:p>35317</text:p>
          </table:table-cell>
          <table:table-cell office:value-type="float" office:value="272357.0">
            <text:p>272357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5355.0">
            <text:p>5355</text:p>
          </table:table-cell>
          <table:table-cell office:value-type="float" office:value="-8452.0">
            <text:p>-8452</text:p>
          </table:table-cell>
          <table:table-cell office:value-type="float" office:value="-760.0">
            <text:p>-760</text:p>
          </table:table-cell>
          <table:table-cell office:value-type="float" office:value="-45409.0">
            <text:p>-45409</text:p>
          </table:table-cell>
          <table:table-cell office:value-type="float" office:value="-347.0">
            <text:p>-347</text:p>
          </table:table-cell>
          <table:table-cell office:value-type="float" office:value="-10096.0">
            <text:p>-10096</text:p>
          </table:table-cell>
          <table:table-cell office:value-type="float" office:value="8240.0">
            <text:p>8240</text:p>
          </table:table-cell>
          <table:table-cell office:value-type="float" office:value="-605538.0">
            <text:p>-605538</text:p>
          </table:table-cell>
          <table:table-cell office:value-type="float" office:value="-1595.0">
            <text:p>-1595</text:p>
          </table:table-cell>
          <table:table-cell office:value-type="float" office:value="-113231.0">
            <text:p>-113231</text:p>
          </table:table-cell>
          <table:table-cell office:value-type="float" office:value="2588.0">
            <text:p>2588</text:p>
          </table:table-cell>
          <table:table-cell office:value-type="float" office:value="405150.0">
            <text:p>405150</text:p>
          </table:table-cell>
          <table:table-cell office:value-type="float" office:value="63957.0">
            <text:p>63957</text:p>
          </table:table-cell>
          <table:table-cell office:value-type="float" office:value="313619.0">
            <text:p>313619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5445.0">
            <text:p>-5445</text:p>
          </table:table-cell>
          <table:table-cell office:value-type="float" office:value="134810.0">
            <text:p>134810</text:p>
          </table:table-cell>
          <table:table-cell office:value-type="float" office:value="-300.0">
            <text:p>-300</text:p>
          </table:table-cell>
          <table:table-cell office:value-type="float" office:value="-15662.0">
            <text:p>-15662</text:p>
          </table:table-cell>
          <table:table-cell office:value-type="float" office:value="-3993.0">
            <text:p>-3993</text:p>
          </table:table-cell>
          <table:table-cell office:value-type="float" office:value="-36233.0">
            <text:p>-36233</text:p>
          </table:table-cell>
          <table:table-cell office:value-type="float" office:value="8325.0">
            <text:p>8325</text:p>
          </table:table-cell>
          <table:table-cell office:value-type="float" office:value="-589607.0">
            <text:p>-589607</text:p>
          </table:table-cell>
          <table:table-cell office:value-type="float" office:value="-1595.0">
            <text:p>-1595</text:p>
          </table:table-cell>
          <table:table-cell office:value-type="float" office:value="-141217.0">
            <text:p>-141217</text:p>
          </table:table-cell>
          <table:table-cell office:value-type="float" office:value="2347.0">
            <text:p>2347</text:p>
          </table:table-cell>
          <table:table-cell office:value-type="float" office:value="368260.0">
            <text:p>368260</text:p>
          </table:table-cell>
          <table:table-cell office:value-type="float" office:value="-82915.0">
            <text:p>-82915</text:p>
          </table:table-cell>
          <table:table-cell office:value-type="float" office:value="362564.0">
            <text:p>36256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4766.0">
            <text:p>4766</text:p>
          </table:table-cell>
          <table:table-cell office:value-type="float" office:value="29556.0">
            <text:p>29556</text:p>
          </table:table-cell>
          <table:table-cell office:value-type="float" office:value="-40.0">
            <text:p>-40</text:p>
          </table:table-cell>
          <table:table-cell office:value-type="float" office:value="-750.0">
            <text:p>-750</text:p>
          </table:table-cell>
          <table:table-cell office:value-type="float" office:value="920.0">
            <text:p>920</text:p>
          </table:table-cell>
          <table:table-cell office:value-type="float" office:value="-6088.0">
            <text:p>-6088</text:p>
          </table:table-cell>
          <table:table-cell office:value-type="float" office:value="13091.0">
            <text:p>13091</text:p>
          </table:table-cell>
          <table:table-cell office:value-type="float" office:value="-543045.0">
            <text:p>-543045</text:p>
          </table:table-cell>
          <table:table-cell office:value-type="float" office:value="-1635.0">
            <text:p>-1635</text:p>
          </table:table-cell>
          <table:table-cell office:value-type="float" office:value="-220943.0">
            <text:p>-220943</text:p>
          </table:table-cell>
          <table:table-cell office:value-type="float" office:value="3267.0">
            <text:p>3267</text:p>
          </table:table-cell>
          <table:table-cell office:value-type="float" office:value="361304.0">
            <text:p>361304</text:p>
          </table:table-cell>
          <table:table-cell office:value-type="float" office:value="-22718.0">
            <text:p>-22718</text:p>
          </table:table-cell>
          <table:table-cell office:value-type="float" office:value="402684.0">
            <text:p>402684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147.0">
            <text:p>2147</text:p>
          </table:table-cell>
          <table:table-cell office:value-type="float" office:value="-1854.0">
            <text:p>-1854</text:p>
          </table:table-cell>
          <table:table-cell office:value-type="float" office:value="100.0">
            <text:p>100</text:p>
          </table:table-cell>
          <table:table-cell office:value-type="float" office:value="16679.0">
            <text:p>16679</text:p>
          </table:table-cell>
          <table:table-cell office:value-type="float" office:value="31.0">
            <text:p>31</text:p>
          </table:table-cell>
          <table:table-cell office:value-type="float" office:value="-5565.0">
            <text:p>-5565</text:p>
          </table:table-cell>
          <table:table-cell office:value-type="float" office:value="15238.0">
            <text:p>15238</text:p>
          </table:table-cell>
          <table:table-cell office:value-type="float" office:value="-567902.0">
            <text:p>-567902</text:p>
          </table:table-cell>
          <table:table-cell office:value-type="float" office:value="-1535.0">
            <text:p>-1535</text:p>
          </table:table-cell>
          <table:table-cell office:value-type="float" office:value="-213450.0">
            <text:p>-213450</text:p>
          </table:table-cell>
          <table:table-cell office:value-type="float" office:value="3298.0">
            <text:p>3298</text:p>
          </table:table-cell>
          <table:table-cell office:value-type="float" office:value="349602.0">
            <text:p>349602</text:p>
          </table:table-cell>
          <table:table-cell office:value-type="float" office:value="-9260.0">
            <text:p>-9260</text:p>
          </table:table-cell>
          <table:table-cell office:value-type="float" office:value="431750.0">
            <text:p>43175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0767.0">
            <text:p>-10767</text:p>
          </table:table-cell>
          <table:table-cell office:value-type="float" office:value="-38539.0">
            <text:p>-38539</text:p>
          </table:table-cell>
          <table:table-cell office:value-type="float" office:value="7.0">
            <text:p>7</text:p>
          </table:table-cell>
          <table:table-cell office:value-type="float" office:value="-1305.0">
            <text:p>-1305</text:p>
          </table:table-cell>
          <table:table-cell office:value-type="float" office:value="40.0">
            <text:p>40</text:p>
          </table:table-cell>
          <table:table-cell office:value-type="float" office:value="-6383.0">
            <text:p>-6383</text:p>
          </table:table-cell>
          <table:table-cell office:value-type="float" office:value="1322.0">
            <text:p>1322</text:p>
          </table:table-cell>
          <table:table-cell office:value-type="float" office:value="10241.0">
            <text:p>10241</text:p>
          </table:table-cell>
          <table:table-cell office:value-type="float" office:value="-266.0">
            <text:p>-266</text:p>
          </table:table-cell>
          <table:table-cell office:value-type="float" office:value="-9837.0">
            <text:p>-9837</text:p>
          </table:table-cell>
          <table:table-cell office:value-type="float" office:value="-1227.0">
            <text:p>-1227</text:p>
          </table:table-cell>
          <table:table-cell office:value-type="float" office:value="-234747.0">
            <text:p>-234747</text:p>
          </table:table-cell>
          <table:table-cell office:value-type="float" office:value="46227.0">
            <text:p>46227</text:p>
          </table:table-cell>
          <table:table-cell office:value-type="float" office:value="234343.0">
            <text:p>234343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94.0">
            <text:p>6394</text:p>
          </table:table-cell>
          <table:table-cell office:value-type="float" office:value="-129855.0">
            <text:p>-129855</text:p>
          </table:table-cell>
          <table:table-cell office:value-type="float" office:value="-1240.0">
            <text:p>-1240</text:p>
          </table:table-cell>
          <table:table-cell office:value-type="float" office:value="-78380.0">
            <text:p>-78380</text:p>
          </table:table-cell>
          <table:table-cell office:value-type="float" office:value="-243.0">
            <text:p>-243</text:p>
          </table:table-cell>
          <table:table-cell office:value-type="float" office:value="-22174.0">
            <text:p>-22174</text:p>
          </table:table-cell>
          <table:table-cell office:value-type="float" office:value="7716.0">
            <text:p>7716</text:p>
          </table:table-cell>
          <table:table-cell office:value-type="float" office:value="-139013.0">
            <text:p>-139013</text:p>
          </table:table-cell>
          <table:table-cell office:value-type="float" office:value="-1506.0">
            <text:p>-1506</text:p>
          </table:table-cell>
          <table:table-cell office:value-type="float" office:value="-99426.0">
            <text:p>-99426</text:p>
          </table:table-cell>
          <table:table-cell office:value-type="float" office:value="-1470.0">
            <text:p>-1470</text:p>
          </table:table-cell>
          <table:table-cell office:value-type="float" office:value="-293335.0">
            <text:p>-293335</text:p>
          </table:table-cell>
          <table:table-cell office:value-type="float" office:value="230409.0">
            <text:p>230409</text:p>
          </table:table-cell>
          <table:table-cell office:value-type="float" office:value="531774.0">
            <text:p>531774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231.0">
            <text:p>-2231</text:p>
          </table:table-cell>
          <table:table-cell office:value-type="float" office:value="58990.0">
            <text:p>58990</text:p>
          </table:table-cell>
          <table:table-cell office:value-type="float" office:value="-202.0">
            <text:p>-202</text:p>
          </table:table-cell>
          <table:table-cell office:value-type="float" office:value="-12481.0">
            <text:p>-12481</text:p>
          </table:table-cell>
          <table:table-cell office:value-type="float" office:value="-30.0">
            <text:p>-30</text:p>
          </table:table-cell>
          <table:table-cell office:value-type="float" office:value="29896.0">
            <text:p>29896</text:p>
          </table:table-cell>
          <table:table-cell office:value-type="float" office:value="3541.0">
            <text:p>3541</text:p>
          </table:table-cell>
          <table:table-cell office:value-type="float" office:value="-295054.0">
            <text:p>-295054</text:p>
          </table:table-cell>
          <table:table-cell office:value-type="float" office:value="-1408.0">
            <text:p>-1408</text:p>
          </table:table-cell>
          <table:table-cell office:value-type="float" office:value="-159330.0">
            <text:p>-159330</text:p>
          </table:table-cell>
          <table:table-cell office:value-type="float" office:value="-251.0">
            <text:p>-251</text:p>
          </table:table-cell>
          <table:table-cell office:value-type="float" office:value="-334636.0">
            <text:p>-334636</text:p>
          </table:table-cell>
          <table:table-cell office:value-type="float" office:value="-76405.0">
            <text:p>-76405</text:p>
          </table:table-cell>
          <table:table-cell office:value-type="float" office:value="789020.0">
            <text:p>789020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2643.0">
            <text:p>2643</text:p>
          </table:table-cell>
          <table:table-cell office:value-type="float" office:value="-127052.0">
            <text:p>-12705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26.0">
            <text:p>1326</text:p>
          </table:table-cell>
          <table:table-cell office:value-type="float" office:value="13373.0">
            <text:p>13373</text:p>
          </table:table-cell>
          <table:table-cell office:value-type="float" office:value="6184.0">
            <text:p>6184</text:p>
          </table:table-cell>
          <table:table-cell office:value-type="float" office:value="-355637.0">
            <text:p>-355637</text:p>
          </table:table-cell>
          <table:table-cell office:value-type="float" office:value="-1408.0">
            <text:p>-1408</text:p>
          </table:table-cell>
          <table:table-cell office:value-type="float" office:value="-107667.0">
            <text:p>-107667</text:p>
          </table:table-cell>
          <table:table-cell office:value-type="float" office:value="1075.0">
            <text:p>1075</text:p>
          </table:table-cell>
          <table:table-cell office:value-type="float" office:value="-283200.0">
            <text:p>-283200</text:p>
          </table:table-cell>
          <table:table-cell office:value-type="float" office:value="113679.0">
            <text:p>113679</text:p>
          </table:table-cell>
          <table:table-cell office:value-type="float" office:value="746504.0">
            <text:p>746504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19272.0">
            <text:p>-19272</text:p>
          </table:table-cell>
          <table:table-cell office:value-type="float" office:value="-33117.0">
            <text:p>-33117</text:p>
          </table:table-cell>
          <table:table-cell office:value-type="float" office:value="-410.0">
            <text:p>-410</text:p>
          </table:table-cell>
          <table:table-cell office:value-type="float" office:value="-42266.0">
            <text:p>-42266</text:p>
          </table:table-cell>
          <table:table-cell office:value-type="float" office:value="-1382.0">
            <text:p>-1382</text:p>
          </table:table-cell>
          <table:table-cell office:value-type="float" office:value="-39740.0">
            <text:p>-39740</text:p>
          </table:table-cell>
          <table:table-cell office:value-type="float" office:value="-773.0">
            <text:p>-773</text:p>
          </table:table-cell>
          <table:table-cell office:value-type="float" office:value="-294248.0">
            <text:p>-294248</text:p>
          </table:table-cell>
          <table:table-cell office:value-type="float" office:value="-1538.0">
            <text:p>-1538</text:p>
          </table:table-cell>
          <table:table-cell office:value-type="float" office:value="-98184.0">
            <text:p>-98184</text:p>
          </table:table-cell>
          <table:table-cell office:value-type="float" office:value="-765.0">
            <text:p>-765</text:p>
          </table:table-cell>
          <table:table-cell office:value-type="float" office:value="-251788.0">
            <text:p>-251788</text:p>
          </table:table-cell>
          <table:table-cell office:value-type="float" office:value="115123.0">
            <text:p>115123</text:p>
          </table:table-cell>
          <table:table-cell office:value-type="float" office:value="644220.0">
            <text:p>644220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7636.0">
            <text:p>7636</text:p>
          </table:table-cell>
          <table:table-cell office:value-type="float" office:value="-1969.0">
            <text:p>-1969</text:p>
          </table:table-cell>
          <table:table-cell office:value-type="float" office:value="-50.0">
            <text:p>-50</text:p>
          </table:table-cell>
          <table:table-cell office:value-type="float" office:value="-1887.0">
            <text:p>-1887</text:p>
          </table:table-cell>
          <table:table-cell office:value-type="float" office:value="-209.0">
            <text:p>-209</text:p>
          </table:table-cell>
          <table:table-cell office:value-type="float" office:value="-5696.0">
            <text:p>-5696</text:p>
          </table:table-cell>
          <table:table-cell office:value-type="float" office:value="6863.0">
            <text:p>6863</text:p>
          </table:table-cell>
          <table:table-cell office:value-type="float" office:value="-301528.0">
            <text:p>-301528</text:p>
          </table:table-cell>
          <table:table-cell office:value-type="float" office:value="-1588.0">
            <text:p>-1588</text:p>
          </table:table-cell>
          <table:table-cell office:value-type="float" office:value="-101295.0">
            <text:p>-101295</text:p>
          </table:table-cell>
          <table:table-cell office:value-type="float" office:value="-974.0">
            <text:p>-974</text:p>
          </table:table-cell>
          <table:table-cell office:value-type="float" office:value="-265490.0">
            <text:p>-265490</text:p>
          </table:table-cell>
          <table:table-cell office:value-type="float" office:value="9552.0">
            <text:p>9552</text:p>
          </table:table-cell>
          <table:table-cell office:value-type="float" office:value="668313.0">
            <text:p>668313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19072.0">
            <text:p>-19072</text:p>
          </table:table-cell>
          <table:table-cell office:value-type="float" office:value="-12381.0">
            <text:p>-12381</text:p>
          </table:table-cell>
          <table:table-cell office:value-type="float" office:value="-570.0">
            <text:p>-570</text:p>
          </table:table-cell>
          <table:table-cell office:value-type="float" office:value="-46825.0">
            <text:p>-46825</text:p>
          </table:table-cell>
          <table:table-cell office:value-type="float" office:value="-3020.0">
            <text:p>-3020</text:p>
          </table:table-cell>
          <table:table-cell office:value-type="float" office:value="-27586.0">
            <text:p>-27586</text:p>
          </table:table-cell>
          <table:table-cell office:value-type="float" office:value="-1997.0">
            <text:p>-1997</text:p>
          </table:table-cell>
          <table:table-cell office:value-type="float" office:value="-131477.0">
            <text:p>-131477</text:p>
          </table:table-cell>
          <table:table-cell office:value-type="float" office:value="-1708.0">
            <text:p>-1708</text:p>
          </table:table-cell>
          <table:table-cell office:value-type="float" office:value="-71449.0">
            <text:p>-71449</text:p>
          </table:table-cell>
          <table:table-cell office:value-type="float" office:value="-1022.0">
            <text:p>-1022</text:p>
          </table:table-cell>
          <table:table-cell office:value-type="float" office:value="-188886.0">
            <text:p>-188886</text:p>
          </table:table-cell>
          <table:table-cell office:value-type="float" office:value="86792.0">
            <text:p>86792</text:p>
          </table:table-cell>
          <table:table-cell office:value-type="float" office:value="391812.0">
            <text:p>391812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4916.0">
            <text:p>4916</text:p>
          </table:table-cell>
          <table:table-cell office:value-type="float" office:value="49010.0">
            <text:p>49010</text:p>
          </table:table-cell>
          <table:table-cell office:value-type="float" office:value="-49.0">
            <text:p>-49</text:p>
          </table:table-cell>
          <table:table-cell office:value-type="float" office:value="-1972.0">
            <text:p>-1972</text:p>
          </table:table-cell>
          <table:table-cell office:value-type="float" office:value="1031.0">
            <text:p>1031</text:p>
          </table:table-cell>
          <table:table-cell office:value-type="float" office:value="-22257.0">
            <text:p>-22257</text:p>
          </table:table-cell>
          <table:table-cell office:value-type="float" office:value="2919.0">
            <text:p>2919</text:p>
          </table:table-cell>
          <table:table-cell office:value-type="float" office:value="-121652.0">
            <text:p>-121652</text:p>
          </table:table-cell>
          <table:table-cell office:value-type="float" office:value="-1757.0">
            <text:p>-1757</text:p>
          </table:table-cell>
          <table:table-cell office:value-type="float" office:value="-95723.0">
            <text:p>-95723</text:p>
          </table:table-cell>
          <table:table-cell office:value-type="float" office:value="9.0">
            <text:p>9</text:p>
          </table:table-cell>
          <table:table-cell office:value-type="float" office:value="-238484.0">
            <text:p>-238484</text:p>
          </table:table-cell>
          <table:table-cell office:value-type="float" office:value="-24781.0">
            <text:p>-24781</text:p>
          </table:table-cell>
          <table:table-cell office:value-type="float" office:value="455859.0">
            <text:p>45585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65.0">
            <text:p>-365</text:p>
          </table:table-cell>
          <table:table-cell office:value-type="float" office:value="-14545.0">
            <text:p>-145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7.0">
            <text:p>1397</text:p>
          </table:table-cell>
          <table:table-cell office:value-type="float" office:value="4496.0">
            <text:p>4496</text:p>
          </table:table-cell>
          <table:table-cell office:value-type="float" office:value="2554.0">
            <text:p>2554</text:p>
          </table:table-cell>
          <table:table-cell office:value-type="float" office:value="-171017.0">
            <text:p>-171017</text:p>
          </table:table-cell>
          <table:table-cell office:value-type="float" office:value="-1757.0">
            <text:p>-1757</text:p>
          </table:table-cell>
          <table:table-cell office:value-type="float" office:value="-157674.0">
            <text:p>-157674</text:p>
          </table:table-cell>
          <table:table-cell office:value-type="float" office:value="1406.0">
            <text:p>1406</text:p>
          </table:table-cell>
          <table:table-cell office:value-type="float" office:value="-279215.0">
            <text:p>-279215</text:p>
          </table:table-cell>
          <table:table-cell office:value-type="float" office:value="10049.0">
            <text:p>10049</text:p>
          </table:table-cell>
          <table:table-cell office:value-type="float" office:value="607906.0">
            <text:p>60790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2708.0">
            <text:p>-2708</text:p>
          </table:table-cell>
          <table:table-cell office:value-type="float" office:value="48851.0">
            <text:p>48851</text:p>
          </table:table-cell>
          <table:table-cell office:value-type="float" office:value="-128.0">
            <text:p>-128</text:p>
          </table:table-cell>
          <table:table-cell office:value-type="float" office:value="-6603.0">
            <text:p>-6603</text:p>
          </table:table-cell>
          <table:table-cell office:value-type="float" office:value="-2369.0">
            <text:p>-2369</text:p>
          </table:table-cell>
          <table:table-cell office:value-type="float" office:value="-2307.0">
            <text:p>-2307</text:p>
          </table:table-cell>
          <table:table-cell office:value-type="float" office:value="561.0">
            <text:p>561</text:p>
          </table:table-cell>
          <table:table-cell office:value-type="float" office:value="-244078.0">
            <text:p>-244078</text:p>
          </table:table-cell>
          <table:table-cell office:value-type="float" office:value="-1435.0">
            <text:p>-1435</text:p>
          </table:table-cell>
          <table:table-cell office:value-type="float" office:value="-136681.0">
            <text:p>-136681</text:p>
          </table:table-cell>
          <table:table-cell office:value-type="float" office:value="-507.0">
            <text:p>-507</text:p>
          </table:table-cell>
          <table:table-cell office:value-type="float" office:value="-338773.0">
            <text:p>-338773</text:p>
          </table:table-cell>
          <table:table-cell office:value-type="float" office:value="-39941.0">
            <text:p>-39941</text:p>
          </table:table-cell>
          <table:table-cell office:value-type="float" office:value="719532.0">
            <text:p>719532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824.0">
            <text:p>824</text:p>
          </table:table-cell>
          <table:table-cell office:value-type="float" office:value="-70316.0">
            <text:p>-70316</text:p>
          </table:table-cell>
          <table:table-cell office:value-type="float" office:value="-150.0">
            <text:p>-150</text:p>
          </table:table-cell>
          <table:table-cell office:value-type="float" office:value="-6543.0">
            <text:p>-6543</text:p>
          </table:table-cell>
          <table:table-cell office:value-type="float" office:value="-154.0">
            <text:p>-154</text:p>
          </table:table-cell>
          <table:table-cell office:value-type="float" office:value="-17665.0">
            <text:p>-17665</text:p>
          </table:table-cell>
          <table:table-cell office:value-type="float" office:value="1385.0">
            <text:p>1385</text:p>
          </table:table-cell>
          <table:table-cell office:value-type="float" office:value="-252729.0">
            <text:p>-252729</text:p>
          </table:table-cell>
          <table:table-cell office:value-type="float" office:value="-1585.0">
            <text:p>-1585</text:p>
          </table:table-cell>
          <table:table-cell office:value-type="float" office:value="-110241.0">
            <text:p>-110241</text:p>
          </table:table-cell>
          <table:table-cell office:value-type="float" office:value="-661.0">
            <text:p>-661</text:p>
          </table:table-cell>
          <table:table-cell office:value-type="float" office:value="-317132.0">
            <text:p>-317132</text:p>
          </table:table-cell>
          <table:table-cell office:value-type="float" office:value="94524.0">
            <text:p>94524</text:p>
          </table:table-cell>
          <table:table-cell office:value-type="float" office:value="680102.0">
            <text:p>680102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2486.0">
            <text:p>2486</text:p>
          </table:table-cell>
          <table:table-cell office:value-type="float" office:value="121174.0">
            <text:p>121174</text:p>
          </table:table-cell>
          <table:table-cell office:value-type="float" office:value="-800.0">
            <text:p>-800</text:p>
          </table:table-cell>
          <table:table-cell office:value-type="float" office:value="-63497.0">
            <text:p>-63497</text:p>
          </table:table-cell>
          <table:table-cell office:value-type="float" office:value="-463.0">
            <text:p>-463</text:p>
          </table:table-cell>
          <table:table-cell office:value-type="float" office:value="-4850.0">
            <text:p>-4850</text:p>
          </table:table-cell>
          <table:table-cell office:value-type="float" office:value="-1490.0">
            <text:p>-1490</text:p>
          </table:table-cell>
          <table:table-cell office:value-type="float" office:value="-282235.0">
            <text:p>-282235</text:p>
          </table:table-cell>
          <table:table-cell office:value-type="float" office:value="-1535.0">
            <text:p>-1535</text:p>
          </table:table-cell>
          <table:table-cell office:value-type="float" office:value="-103222.0">
            <text:p>-103222</text:p>
          </table:table-cell>
          <table:table-cell office:value-type="float" office:value="-641.0">
            <text:p>-641</text:p>
          </table:table-cell>
          <table:table-cell office:value-type="float" office:value="-345818.0">
            <text:p>-345818</text:p>
          </table:table-cell>
          <table:table-cell office:value-type="float" office:value="-52827.0">
            <text:p>-52827</text:p>
          </table:table-cell>
          <table:table-cell office:value-type="float" office:value="731275.0">
            <text:p>731275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8640.0">
            <text:p>-8640</text:p>
          </table:table-cell>
          <table:table-cell office:value-type="float" office:value="-126130.0">
            <text:p>-126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16.0">
            <text:p>2416</text:p>
          </table:table-cell>
          <table:table-cell office:value-type="float" office:value="19655.0">
            <text:p>19655</text:p>
          </table:table-cell>
          <table:table-cell office:value-type="float" office:value="293.0">
            <text:p>293</text:p>
          </table:table-cell>
          <table:table-cell office:value-type="float" office:value="-44201.0">
            <text:p>-44201</text:p>
          </table:table-cell>
          <table:table-cell office:value-type="float" office:value="193.0">
            <text:p>193</text:p>
          </table:table-cell>
          <table:table-cell office:value-type="float" office:value="599.0">
            <text:p>599</text:p>
          </table:table-cell>
          <table:table-cell office:value-type="float" office:value="8993.0">
            <text:p>8993</text:p>
          </table:table-cell>
          <table:table-cell office:value-type="float" office:value="160768.0">
            <text:p>160768</text:p>
          </table:table-cell>
          <table:table-cell office:value-type="float" office:value="106475.0">
            <text:p>106475</text:p>
          </table:table-cell>
          <table:table-cell office:value-type="float" office:value="-117166.0">
            <text:p>-117166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17275.0">
            <text:p>-17275</text:p>
          </table:table-cell>
          <table:table-cell office:value-type="float" office:value="-7518.0">
            <text:p>-75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3.0">
            <text:p>-33</text:p>
          </table:table-cell>
          <table:table-cell office:value-type="float" office:value="12356.0">
            <text:p>12356</text:p>
          </table:table-cell>
          <table:table-cell office:value-type="float" office:value="-1211.0">
            <text:p>-1211</text:p>
          </table:table-cell>
          <table:table-cell office:value-type="float" office:value="-145422.0">
            <text:p>-145422</text:p>
          </table:table-cell>
          <table:table-cell office:value-type="float" office:value="193.0">
            <text:p>193</text:p>
          </table:table-cell>
          <table:table-cell office:value-type="float" office:value="2131.0">
            <text:p>2131</text:p>
          </table:table-cell>
          <table:table-cell office:value-type="float" office:value="6363.0">
            <text:p>6363</text:p>
          </table:table-cell>
          <table:table-cell office:value-type="float" office:value="252923.0">
            <text:p>252923</text:p>
          </table:table-cell>
          <table:table-cell office:value-type="float" office:value="-4838.0">
            <text:p>-4838</text:p>
          </table:table-cell>
          <table:table-cell office:value-type="float" office:value="-109632.0">
            <text:p>-109632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6701.0">
            <text:p>6701</text:p>
          </table:table-cell>
          <table:table-cell office:value-type="float" office:value="104607.0">
            <text:p>1046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50.0">
            <text:p>-950</text:p>
          </table:table-cell>
          <table:table-cell office:value-type="float" office:value="-16778.0">
            <text:p>-16778</text:p>
          </table:table-cell>
          <table:table-cell office:value-type="float" office:value="5490.0">
            <text:p>5490</text:p>
          </table:table-cell>
          <table:table-cell office:value-type="float" office:value="-59172.0">
            <text:p>-59172</text:p>
          </table:table-cell>
          <table:table-cell office:value-type="float" office:value="193.0">
            <text:p>193</text:p>
          </table:table-cell>
          <table:table-cell office:value-type="float" office:value="974.0">
            <text:p>974</text:p>
          </table:table-cell>
          <table:table-cell office:value-type="float" office:value="5413.0">
            <text:p>5413</text:p>
          </table:table-cell>
          <table:table-cell office:value-type="float" office:value="224675.0">
            <text:p>224675</text:p>
          </table:table-cell>
          <table:table-cell office:value-type="float" office:value="-87829.0">
            <text:p>-87829</text:p>
          </table:table-cell>
          <table:table-cell office:value-type="float" office:value="-166477.0">
            <text:p>-166477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22586.0">
            <text:p>-22586</text:p>
          </table:table-cell>
          <table:table-cell office:value-type="float" office:value="-49668.0">
            <text:p>-4966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9.0">
            <text:p>189</text:p>
          </table:table-cell>
          <table:table-cell office:value-type="float" office:value="9435.0">
            <text:p>9435</text:p>
          </table:table-cell>
          <table:table-cell office:value-type="float" office:value="-1296.0">
            <text:p>-1296</text:p>
          </table:table-cell>
          <table:table-cell office:value-type="float" office:value="-109821.0">
            <text:p>-109821</text:p>
          </table:table-cell>
          <table:table-cell office:value-type="float" office:value="193.0">
            <text:p>193</text:p>
          </table:table-cell>
          <table:table-cell office:value-type="float" office:value="319.0">
            <text:p>319</text:p>
          </table:table-cell>
          <table:table-cell office:value-type="float" office:value="5948.0">
            <text:p>5948</text:p>
          </table:table-cell>
          <table:table-cell office:value-type="float" office:value="182331.0">
            <text:p>182331</text:p>
          </table:table-cell>
          <table:table-cell office:value-type="float" office:value="40233.0">
            <text:p>40233</text:p>
          </table:table-cell>
          <table:table-cell office:value-type="float" office:value="-72829.0">
            <text:p>-72829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2700.0">
            <text:p>-2700</text:p>
          </table:table-cell>
          <table:table-cell office:value-type="float" office:value="-34553.0">
            <text:p>-34553</text:p>
          </table:table-cell>
          <table:table-cell office:value-type="float" office:value="80.0">
            <text:p>80</text:p>
          </table:table-cell>
          <table:table-cell office:value-type="float" office:value="594.0">
            <text:p>594</text:p>
          </table:table-cell>
          <table:table-cell office:value-type="float" office:value="6734.0">
            <text:p>6734</text:p>
          </table:table-cell>
          <table:table-cell office:value-type="float" office:value="2164.0">
            <text:p>2164</text:p>
          </table:table-cell>
          <table:table-cell office:value-type="float" office:value="-3996.0">
            <text:p>-3996</text:p>
          </table:table-cell>
          <table:table-cell office:value-type="float" office:value="-109192.0">
            <text:p>-109192</text:p>
          </table:table-cell>
          <table:table-cell office:value-type="float" office:value="273.0">
            <text:p>273</text:p>
          </table:table-cell>
          <table:table-cell office:value-type="float" office:value="358.0">
            <text:p>358</text:p>
          </table:table-cell>
          <table:table-cell office:value-type="float" office:value="12682.0">
            <text:p>12682</text:p>
          </table:table-cell>
          <table:table-cell office:value-type="float" office:value="136011.0">
            <text:p>136011</text:p>
          </table:table-cell>
          <table:table-cell office:value-type="float" office:value="31795.0">
            <text:p>31795</text:p>
          </table:table-cell>
          <table:table-cell office:value-type="float" office:value="-27177.0">
            <text:p>-27177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12318.0">
            <text:p>-12318</text:p>
          </table:table-cell>
          <table:table-cell office:value-type="float" office:value="-43429.0">
            <text:p>-4342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909.0">
            <text:p>2909</text:p>
          </table:table-cell>
          <table:table-cell office:value-type="float" office:value="-14017.0">
            <text:p>-14017</text:p>
          </table:table-cell>
          <table:table-cell office:value-type="float" office:value="-16314.0">
            <text:p>-16314</text:p>
          </table:table-cell>
          <table:table-cell office:value-type="float" office:value="-133254.0">
            <text:p>-133254</text:p>
          </table:table-cell>
          <table:table-cell office:value-type="float" office:value="273.0">
            <text:p>273</text:p>
          </table:table-cell>
          <table:table-cell office:value-type="float" office:value="74.0">
            <text:p>74</text:p>
          </table:table-cell>
          <table:table-cell office:value-type="float" office:value="15591.0">
            <text:p>15591</text:p>
          </table:table-cell>
          <table:table-cell office:value-type="float" office:value="113176.0">
            <text:p>113176</text:p>
          </table:table-cell>
          <table:table-cell office:value-type="float" office:value="57446.0">
            <text:p>57446</text:p>
          </table:table-cell>
          <table:table-cell office:value-type="float" office:value="20004.0">
            <text:p>20004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2601.0">
            <text:p>-12601</text:p>
          </table:table-cell>
          <table:table-cell office:value-type="float" office:value="64956.0">
            <text:p>64956</text:p>
          </table:table-cell>
          <table:table-cell office:value-type="float" office:value="87.0">
            <text:p>87</text:p>
          </table:table-cell>
          <table:table-cell office:value-type="float" office:value="2039.0">
            <text:p>2039</text:p>
          </table:table-cell>
          <table:table-cell office:value-type="float" office:value="-2235.0">
            <text:p>-2235</text:p>
          </table:table-cell>
          <table:table-cell office:value-type="float" office:value="-41705.0">
            <text:p>-41705</text:p>
          </table:table-cell>
          <table:table-cell office:value-type="float" office:value="842.0">
            <text:p>842</text:p>
          </table:table-cell>
          <table:table-cell office:value-type="float" office:value="-56308.0">
            <text:p>-56308</text:p>
          </table:table-cell>
          <table:table-cell office:value-type="float" office:value="87.0">
            <text:p>87</text:p>
          </table:table-cell>
          <table:table-cell office:value-type="float" office:value="1772.0">
            <text:p>1772</text:p>
          </table:table-cell>
          <table:table-cell office:value-type="float" office:value="1526.0">
            <text:p>1526</text:p>
          </table:table-cell>
          <table:table-cell office:value-type="float" office:value="82641.0">
            <text:p>82641</text:p>
          </table:table-cell>
          <table:table-cell office:value-type="float" office:value="-25290.0">
            <text:p>-25290</text:p>
          </table:table-cell>
          <table:table-cell office:value-type="float" office:value="-28105.0">
            <text:p>-28105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241.0">
            <text:p>-241</text:p>
          </table:table-cell>
          <table:table-cell office:value-type="float" office:value="68172.0">
            <text:p>681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96.0">
            <text:p>2296</text:p>
          </table:table-cell>
          <table:table-cell office:value-type="float" office:value="-18867.0">
            <text:p>-18867</text:p>
          </table:table-cell>
          <table:table-cell office:value-type="float" office:value="601.0">
            <text:p>601</text:p>
          </table:table-cell>
          <table:table-cell office:value-type="float" office:value="18665.0">
            <text:p>18665</text:p>
          </table:table-cell>
          <table:table-cell office:value-type="float" office:value="87.0">
            <text:p>87</text:p>
          </table:table-cell>
          <table:table-cell office:value-type="float" office:value="1597.0">
            <text:p>1597</text:p>
          </table:table-cell>
          <table:table-cell office:value-type="float" office:value="3822.0">
            <text:p>3822</text:p>
          </table:table-cell>
          <table:table-cell office:value-type="float" office:value="64595.0">
            <text:p>64595</text:p>
          </table:table-cell>
          <table:table-cell office:value-type="float" office:value="-49305.0">
            <text:p>-49305</text:p>
          </table:table-cell>
          <table:table-cell office:value-type="float" office:value="-84857.0">
            <text:p>-8485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0885.0">
            <text:p>-20885</text:p>
          </table:table-cell>
          <table:table-cell office:value-type="float" office:value="-66740.0">
            <text:p>-667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119.0">
            <text:p>2119</text:p>
          </table:table-cell>
          <table:table-cell office:value-type="float" office:value="-12191.0">
            <text:p>-12191</text:p>
          </table:table-cell>
          <table:table-cell office:value-type="float" office:value="557.0">
            <text:p>557</text:p>
          </table:table-cell>
          <table:table-cell office:value-type="float" office:value="4169.0">
            <text:p>4169</text:p>
          </table:table-cell>
          <table:table-cell office:value-type="float" office:value="87.0">
            <text:p>87</text:p>
          </table:table-cell>
          <table:table-cell office:value-type="float" office:value="839.0">
            <text:p>839</text:p>
          </table:table-cell>
          <table:table-cell office:value-type="float" office:value="4558.0">
            <text:p>4558</text:p>
          </table:table-cell>
          <table:table-cell office:value-type="float" office:value="63030.0">
            <text:p>63030</text:p>
          </table:table-cell>
          <table:table-cell office:value-type="float" office:value="78931.0">
            <text:p>78931</text:p>
          </table:table-cell>
          <table:table-cell office:value-type="float" office:value="-68038.0">
            <text:p>-68038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3195.0">
            <text:p>3195</text:p>
          </table:table-cell>
          <table:table-cell office:value-type="float" office:value="1462.0">
            <text:p>146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14.0">
            <text:p>2214</text:p>
          </table:table-cell>
          <table:table-cell office:value-type="float" office:value="17481.0">
            <text:p>17481</text:p>
          </table:table-cell>
          <table:table-cell office:value-type="float" office:value="3752.0">
            <text:p>3752</text:p>
          </table:table-cell>
          <table:table-cell office:value-type="float" office:value="17625.0">
            <text:p>17625</text:p>
          </table:table-cell>
          <table:table-cell office:value-type="float" office:value="87.0">
            <text:p>87</text:p>
          </table:table-cell>
          <table:table-cell office:value-type="float" office:value="994.0">
            <text:p>994</text:p>
          </table:table-cell>
          <table:table-cell office:value-type="float" office:value="6772.0">
            <text:p>6772</text:p>
          </table:table-cell>
          <table:table-cell office:value-type="float" office:value="75534.0">
            <text:p>75534</text:p>
          </table:table-cell>
          <table:table-cell office:value-type="float" office:value="-18943.0">
            <text:p>-18943</text:p>
          </table:table-cell>
          <table:table-cell office:value-type="float" office:value="-94153.0">
            <text:p>-9415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8612.0">
            <text:p>-8612</text:p>
          </table:table-cell>
          <table:table-cell office:value-type="float" office:value="39648.0">
            <text:p>39648</text:p>
          </table:table-cell>
          <table:table-cell office:value-type="float" office:value="10.0">
            <text:p>10</text:p>
          </table:table-cell>
          <table:table-cell office:value-type="float" office:value="49.0">
            <text:p>49</text:p>
          </table:table-cell>
          <table:table-cell office:value-type="float" office:value="-366.0">
            <text:p>-366</text:p>
          </table:table-cell>
          <table:table-cell office:value-type="float" office:value="25251.0">
            <text:p>25251</text:p>
          </table:table-cell>
          <table:table-cell office:value-type="float" office:value="5850.0">
            <text:p>5850</text:p>
          </table:table-cell>
          <table:table-cell office:value-type="float" office:value="31128.0">
            <text:p>31128</text:p>
          </table:table-cell>
          <table:table-cell office:value-type="float" office:value="87.0">
            <text:p>87</text:p>
          </table:table-cell>
          <table:table-cell office:value-type="float" office:value="1396.0">
            <text:p>1396</text:p>
          </table:table-cell>
          <table:table-cell office:value-type="float" office:value="3981.0">
            <text:p>3981</text:p>
          </table:table-cell>
          <table:table-cell office:value-type="float" office:value="98292.0">
            <text:p>98292</text:p>
          </table:table-cell>
          <table:table-cell office:value-type="float" office:value="-64948.0">
            <text:p>-64948</text:p>
          </table:table-cell>
          <table:table-cell office:value-type="float" office:value="-130816.0">
            <text:p>-13081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147.0">
            <text:p>-147</text:p>
          </table:table-cell>
          <table:table-cell office:value-type="float" office:value="2745.0">
            <text:p>27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65.0">
            <text:p>-65</text:p>
          </table:table-cell>
          <table:table-cell office:value-type="float" office:value="-22068.0">
            <text:p>-22068</text:p>
          </table:table-cell>
          <table:table-cell office:value-type="float" office:value="5703.0">
            <text:p>5703</text:p>
          </table:table-cell>
          <table:table-cell office:value-type="float" office:value="29719.0">
            <text:p>29719</text:p>
          </table:table-cell>
          <table:table-cell office:value-type="float" office:value="87.0">
            <text:p>87</text:p>
          </table:table-cell>
          <table:table-cell office:value-type="float" office:value="1229.0">
            <text:p>1229</text:p>
          </table:table-cell>
          <table:table-cell office:value-type="float" office:value="3916.0">
            <text:p>3916</text:p>
          </table:table-cell>
          <table:table-cell office:value-type="float" office:value="71856.0">
            <text:p>71856</text:p>
          </table:table-cell>
          <table:table-cell office:value-type="float" office:value="19323.0">
            <text:p>19323</text:p>
          </table:table-cell>
          <table:table-cell office:value-type="float" office:value="-102804.0">
            <text:p>-1028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7929.0">
            <text:p>-7929</text:p>
          </table:table-cell>
          <table:table-cell office:value-type="float" office:value="-15130.0">
            <text:p>-15130</text:p>
          </table:table-cell>
          <table:table-cell office:value-type="float" office:value="100.0">
            <text:p>100</text:p>
          </table:table-cell>
          <table:table-cell office:value-type="float" office:value="123.0">
            <text:p>123</text:p>
          </table:table-cell>
          <table:table-cell office:value-type="float" office:value="1305.0">
            <text:p>1305</text:p>
          </table:table-cell>
          <table:table-cell office:value-type="float" office:value="49249.0">
            <text:p>49249</text:p>
          </table:table-cell>
          <table:table-cell office:value-type="float" office:value="2196.0">
            <text:p>2196</text:p>
          </table:table-cell>
          <table:table-cell office:value-type="float" office:value="10091.0">
            <text:p>10091</text:p>
          </table:table-cell>
          <table:table-cell office:value-type="float" office:value="87.0">
            <text:p>87</text:p>
          </table:table-cell>
          <table:table-cell office:value-type="float" office:value="2624.0">
            <text:p>2624</text:p>
          </table:table-cell>
          <table:table-cell office:value-type="float" office:value="4512.0">
            <text:p>4512</text:p>
          </table:table-cell>
          <table:table-cell office:value-type="float" office:value="152659.0">
            <text:p>152659</text:p>
          </table:table-cell>
          <table:table-cell office:value-type="float" office:value="-34242.0">
            <text:p>-34242</text:p>
          </table:table-cell>
          <table:table-cell office:value-type="float" office:value="-165374.0">
            <text:p>-165374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3416.0">
            <text:p>3416</text:p>
          </table:table-cell>
          <table:table-cell office:value-type="float" office:value="25480.0">
            <text:p>25480</text:p>
          </table:table-cell>
          <table:table-cell office:value-type="float" office:value="30.0">
            <text:p>30</text:p>
          </table:table-cell>
          <table:table-cell office:value-type="float" office:value="340.0">
            <text:p>340</text:p>
          </table:table-cell>
          <table:table-cell office:value-type="float" office:value="-292.0">
            <text:p>-292</text:p>
          </table:table-cell>
          <table:table-cell office:value-type="float" office:value="-33575.0">
            <text:p>-33575</text:p>
          </table:table-cell>
          <table:table-cell office:value-type="float" office:value="5612.0">
            <text:p>5612</text:p>
          </table:table-cell>
          <table:table-cell office:value-type="float" office:value="25018.0">
            <text:p>25018</text:p>
          </table:table-cell>
          <table:table-cell office:value-type="float" office:value="117.0">
            <text:p>117</text:p>
          </table:table-cell>
          <table:table-cell office:value-type="float" office:value="1429.0">
            <text:p>1429</text:p>
          </table:table-cell>
          <table:table-cell office:value-type="float" office:value="4220.0">
            <text:p>4220</text:p>
          </table:table-cell>
          <table:table-cell office:value-type="float" office:value="73552.0">
            <text:p>73552</text:p>
          </table:table-cell>
          <table:table-cell office:value-type="float" office:value="7755.0">
            <text:p>7755</text:p>
          </table:table-cell>
          <table:table-cell office:value-type="float" office:value="-99999.0">
            <text:p>-9999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07.0">
            <text:p>107</text:p>
          </table:table-cell>
          <table:table-cell office:value-type="float" office:value="59631.0">
            <text:p>596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-4425.0">
            <text:p>-4425</text:p>
          </table:table-cell>
          <table:table-cell office:value-type="float" office:value="5719.0">
            <text:p>5719</text:p>
          </table:table-cell>
          <table:table-cell office:value-type="float" office:value="65915.0">
            <text:p>65915</text:p>
          </table:table-cell>
          <table:table-cell office:value-type="float" office:value="117.0">
            <text:p>117</text:p>
          </table:table-cell>
          <table:table-cell office:value-type="float" office:value="719.0">
            <text:p>719</text:p>
          </table:table-cell>
          <table:table-cell office:value-type="float" office:value="5759.0">
            <text:p>5759</text:p>
          </table:table-cell>
          <table:table-cell office:value-type="float" office:value="69476.0">
            <text:p>69476</text:p>
          </table:table-cell>
          <table:table-cell office:value-type="float" office:value="-55206.0">
            <text:p>-55206</text:p>
          </table:table-cell>
          <table:table-cell office:value-type="float" office:value="-136110.0">
            <text:p>-136110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13714.0">
            <text:p>-13714</text:p>
          </table:table-cell>
          <table:table-cell office:value-type="float" office:value="-54877.0">
            <text:p>-54877</text:p>
          </table:table-cell>
          <table:table-cell office:value-type="float" office:value="80.0">
            <text:p>80</text:p>
          </table:table-cell>
          <table:table-cell office:value-type="float" office:value="138.0">
            <text:p>138</text:p>
          </table:table-cell>
          <table:table-cell office:value-type="float" office:value="243.0">
            <text:p>243</text:p>
          </table:table-cell>
          <table:table-cell office:value-type="float" office:value="-9177.0">
            <text:p>-9177</text:p>
          </table:table-cell>
          <table:table-cell office:value-type="float" office:value="2194.0">
            <text:p>2194</text:p>
          </table:table-cell>
          <table:table-cell office:value-type="float" office:value="20251.0">
            <text:p>20251</text:p>
          </table:table-cell>
          <table:table-cell office:value-type="float" office:value="87.0">
            <text:p>87</text:p>
          </table:table-cell>
          <table:table-cell office:value-type="float" office:value="547.0">
            <text:p>547</text:p>
          </table:table-cell>
          <table:table-cell office:value-type="float" office:value="4775.0">
            <text:p>4775</text:p>
          </table:table-cell>
          <table:table-cell office:value-type="float" office:value="82015.0">
            <text:p>82015</text:p>
          </table:table-cell>
          <table:table-cell office:value-type="float" office:value="63916.0">
            <text:p>63916</text:p>
          </table:table-cell>
          <table:table-cell office:value-type="float" office:value="-102813.0">
            <text:p>-102813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5905.0">
            <text:p>5905</text:p>
          </table:table-cell>
          <table:table-cell office:value-type="float" office:value="31396.0">
            <text:p>313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05.0">
            <text:p>805</text:p>
          </table:table-cell>
          <table:table-cell office:value-type="float" office:value="10353.0">
            <text:p>10353</text:p>
          </table:table-cell>
          <table:table-cell office:value-type="float" office:value="8099.0">
            <text:p>8099</text:p>
          </table:table-cell>
          <table:table-cell office:value-type="float" office:value="49093.0">
            <text:p>49093</text:p>
          </table:table-cell>
          <table:table-cell office:value-type="float" office:value="87.0">
            <text:p>87</text:p>
          </table:table-cell>
          <table:table-cell office:value-type="float" office:value="527.0">
            <text:p>527</text:p>
          </table:table-cell>
          <table:table-cell office:value-type="float" office:value="5580.0">
            <text:p>5580</text:p>
          </table:table-cell>
          <table:table-cell office:value-type="float" office:value="92619.0">
            <text:p>92619</text:p>
          </table:table-cell>
          <table:table-cell office:value-type="float" office:value="-41749.0">
            <text:p>-41749</text:p>
          </table:table-cell>
          <table:table-cell office:value-type="float" office:value="-142239.0">
            <text:p>-142239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-10976.0">
            <text:p>-10976</text:p>
          </table:table-cell>
          <table:table-cell office:value-type="float" office:value="-10434.0">
            <text:p>-10434</text:p>
          </table:table-cell>
          <table:table-cell office:value-type="float" office:value="100.0">
            <text:p>100</text:p>
          </table:table-cell>
          <table:table-cell office:value-type="float" office:value="41.0">
            <text:p>41</text:p>
          </table:table-cell>
          <table:table-cell office:value-type="float" office:value="-2032.0">
            <text:p>-2032</text:p>
          </table:table-cell>
          <table:table-cell office:value-type="float" office:value="-9828.0">
            <text:p>-9828</text:p>
          </table:table-cell>
          <table:table-cell office:value-type="float" office:value="2714.0">
            <text:p>2714</text:p>
          </table:table-cell>
          <table:table-cell office:value-type="float" office:value="26264.0">
            <text:p>26264</text:p>
          </table:table-cell>
          <table:table-cell office:value-type="float" office:value="87.0">
            <text:p>87</text:p>
          </table:table-cell>
          <table:table-cell office:value-type="float" office:value="384.0">
            <text:p>384</text:p>
          </table:table-cell>
          <table:table-cell office:value-type="float" office:value="6123.0">
            <text:p>6123</text:p>
          </table:table-cell>
          <table:table-cell office:value-type="float" office:value="86773.0">
            <text:p>86773</text:p>
          </table:table-cell>
          <table:table-cell office:value-type="float" office:value="20221.0">
            <text:p>20221</text:p>
          </table:table-cell>
          <table:table-cell office:value-type="float" office:value="-113421.0">
            <text:p>-113421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4077.0">
            <text:p>4077</text:p>
          </table:table-cell>
          <table:table-cell office:value-type="float" office:value="36428693.0">
            <text:p>36428693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4853.0">
            <text:p>4853</text:p>
          </table:table-cell>
          <table:table-cell office:value-type="float" office:value="42097806.0">
            <text:p>42097806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4155.0">
            <text:p>4155</text:p>
          </table:table-cell>
          <table:table-cell office:value-type="float" office:value="35916571.0">
            <text:p>35916571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3568.0">
            <text:p>3568</text:p>
          </table:table-cell>
          <table:table-cell office:value-type="float" office:value="31544230.0">
            <text:p>31544230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2618.0">
            <text:p>2618</text:p>
          </table:table-cell>
          <table:table-cell office:value-type="float" office:value="23774486.0">
            <text:p>23774486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219.0">
            <text:p>2219</text:p>
          </table:table-cell>
          <table:table-cell office:value-type="float" office:value="20308680.0">
            <text:p>2030868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72.0">
            <text:p>72</text:p>
          </table:table-cell>
          <table:table-cell office:value-type="float" office:value="663100.0">
            <text:p>663100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.0">
            <text:p>63</text:p>
          </table:table-cell>
          <table:table-cell office:value-type="float" office:value="579587.0">
            <text:p>57958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563.0">
            <text:p>-563</text:p>
          </table:table-cell>
          <table:table-cell office:value-type="float" office:value="-5458757.0">
            <text:p>-5458757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930.0">
            <text:p>930</text:p>
          </table:table-cell>
          <table:table-cell office:value-type="float" office:value="8834773.0">
            <text:p>883477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3277.0">
            <text:p>3277</text:p>
          </table:table-cell>
          <table:table-cell office:value-type="float" office:value="30437465.0">
            <text:p>30437465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3003.0">
            <text:p>3003</text:p>
          </table:table-cell>
          <table:table-cell office:value-type="float" office:value="27967604.0">
            <text:p>27967604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4641.0">
            <text:p>4641</text:p>
          </table:table-cell>
          <table:table-cell office:value-type="float" office:value="41279878.0">
            <text:p>41279878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2415.0">
            <text:p>2415</text:p>
          </table:table-cell>
          <table:table-cell office:value-type="float" office:value="22032669.0">
            <text:p>2203266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1571.0">
            <text:p>1571</text:p>
          </table:table-cell>
          <table:table-cell office:value-type="float" office:value="14723626.0">
            <text:p>14723626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1592.0">
            <text:p>1592</text:p>
          </table:table-cell>
          <table:table-cell office:value-type="float" office:value="15070428.0">
            <text:p>15070428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3683.0">
            <text:p>3683</text:p>
          </table:table-cell>
          <table:table-cell office:value-type="float" office:value="34363431.0">
            <text:p>34363431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3071.0">
            <text:p>3071</text:p>
          </table:table-cell>
          <table:table-cell office:value-type="float" office:value="28899737.0">
            <text:p>28899737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