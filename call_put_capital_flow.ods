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2095.0">
            <text:p>2095</text:p>
          </table:table-cell>
          <table:table-cell office:value-type="float" office:value="36592.0">
            <text:p>3659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53.0">
            <text:p>-553</text:p>
          </table:table-cell>
          <table:table-cell office:value-type="float" office:value="-43512.0">
            <text:p>-43512</text:p>
          </table:table-cell>
          <table:table-cell office:value-type="float" office:value="4055.0">
            <text:p>4055</text:p>
          </table:table-cell>
          <table:table-cell office:value-type="float" office:value="-168724.0">
            <text:p>-168724</text:p>
          </table:table-cell>
          <table:table-cell office:value-type="float" office:value="-429.0">
            <text:p>-429</text:p>
          </table:table-cell>
          <table:table-cell office:value-type="float" office:value="-158491.0">
            <text:p>-158491</text:p>
          </table:table-cell>
          <table:table-cell office:value-type="float" office:value="1393.0">
            <text:p>1393</text:p>
          </table:table-cell>
          <table:table-cell office:value-type="float" office:value="183157.0">
            <text:p>183157</text:p>
          </table:table-cell>
          <table:table-cell office:value-type="float" office:value="6920.0">
            <text:p>6920</text:p>
          </table:table-cell>
          <table:table-cell office:value-type="float" office:value="144058.0">
            <text:p>14405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3443.0">
            <text:p>-13443</text:p>
          </table:table-cell>
          <table:table-cell office:value-type="float" office:value="14575.0">
            <text:p>145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239.0">
            <text:p>-1239</text:p>
          </table:table-cell>
          <table:table-cell office:value-type="float" office:value="-51632.0">
            <text:p>-51632</text:p>
          </table:table-cell>
          <table:table-cell office:value-type="float" office:value="1796.0">
            <text:p>1796</text:p>
          </table:table-cell>
          <table:table-cell office:value-type="float" office:value="-164249.0">
            <text:p>-164249</text:p>
          </table:table-cell>
          <table:table-cell office:value-type="float" office:value="-429.0">
            <text:p>-429</text:p>
          </table:table-cell>
          <table:table-cell office:value-type="float" office:value="-149403.0">
            <text:p>-149403</text:p>
          </table:table-cell>
          <table:table-cell office:value-type="float" office:value="1770.0">
            <text:p>1770</text:p>
          </table:table-cell>
          <table:table-cell office:value-type="float" office:value="142891.0">
            <text:p>142891</text:p>
          </table:table-cell>
          <table:table-cell office:value-type="float" office:value="37057.0">
            <text:p>37057</text:p>
          </table:table-cell>
          <table:table-cell office:value-type="float" office:value="170761.0">
            <text:p>170761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3101.0">
            <text:p>3101</text:p>
          </table:table-cell>
          <table:table-cell office:value-type="float" office:value="-7133.0">
            <text:p>-7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90.0">
            <text:p>1490</text:p>
          </table:table-cell>
          <table:table-cell office:value-type="float" office:value="-4194.0">
            <text:p>-4194</text:p>
          </table:table-cell>
          <table:table-cell office:value-type="float" office:value="4897.0">
            <text:p>4897</text:p>
          </table:table-cell>
          <table:table-cell office:value-type="float" office:value="-165767.0">
            <text:p>-165767</text:p>
          </table:table-cell>
          <table:table-cell office:value-type="float" office:value="-429.0">
            <text:p>-429</text:p>
          </table:table-cell>
          <table:table-cell office:value-type="float" office:value="-148967.0">
            <text:p>-148967</text:p>
          </table:table-cell>
          <table:table-cell office:value-type="float" office:value="3260.0">
            <text:p>3260</text:p>
          </table:table-cell>
          <table:table-cell office:value-type="float" office:value="123091.0">
            <text:p>123091</text:p>
          </table:table-cell>
          <table:table-cell office:value-type="float" office:value="11327.0">
            <text:p>11327</text:p>
          </table:table-cell>
          <table:table-cell office:value-type="float" office:value="191643.0">
            <text:p>191643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1800.0">
            <text:p>1800</text:p>
          </table:table-cell>
          <table:table-cell office:value-type="float" office:value="46409.0">
            <text:p>46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8.0">
            <text:p>-358</text:p>
          </table:table-cell>
          <table:table-cell office:value-type="float" office:value="-25817.0">
            <text:p>-25817</text:p>
          </table:table-cell>
          <table:table-cell office:value-type="float" office:value="6697.0">
            <text:p>6697</text:p>
          </table:table-cell>
          <table:table-cell office:value-type="float" office:value="-128655.0">
            <text:p>-128655</text:p>
          </table:table-cell>
          <table:table-cell office:value-type="float" office:value="-429.0">
            <text:p>-429</text:p>
          </table:table-cell>
          <table:table-cell office:value-type="float" office:value="-144128.0">
            <text:p>-144128</text:p>
          </table:table-cell>
          <table:table-cell office:value-type="float" office:value="2902.0">
            <text:p>2902</text:p>
          </table:table-cell>
          <table:table-cell office:value-type="float" office:value="103481.0">
            <text:p>103481</text:p>
          </table:table-cell>
          <table:table-cell office:value-type="float" office:value="-20592.0">
            <text:p>-20592</text:p>
          </table:table-cell>
          <table:table-cell office:value-type="float" office:value="169302.0">
            <text:p>16930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8899.0">
            <text:p>-8899</text:p>
          </table:table-cell>
          <table:table-cell office:value-type="float" office:value="-4316.0">
            <text:p>-43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71.0">
            <text:p>1271</text:p>
          </table:table-cell>
          <table:table-cell office:value-type="float" office:value="-7610.0">
            <text:p>-7610</text:p>
          </table:table-cell>
          <table:table-cell office:value-type="float" office:value="9783.0">
            <text:p>9783</text:p>
          </table:table-cell>
          <table:table-cell office:value-type="float" office:value="-124534.0">
            <text:p>-124534</text:p>
          </table:table-cell>
          <table:table-cell office:value-type="float" office:value="-429.0">
            <text:p>-429</text:p>
          </table:table-cell>
          <table:table-cell office:value-type="float" office:value="-138449.0">
            <text:p>-138449</text:p>
          </table:table-cell>
          <table:table-cell office:value-type="float" office:value="928.0">
            <text:p>928</text:p>
          </table:table-cell>
          <table:table-cell office:value-type="float" office:value="109006.0">
            <text:p>109006</text:p>
          </table:table-cell>
          <table:table-cell office:value-type="float" office:value="11926.0">
            <text:p>11926</text:p>
          </table:table-cell>
          <table:table-cell office:value-type="float" office:value="153977.0">
            <text:p>153977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57.0">
            <text:p>-57</text:p>
          </table:table-cell>
          <table:table-cell office:value-type="float" office:value="-28580.0">
            <text:p>-285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98.0">
            <text:p>598</text:p>
          </table:table-cell>
          <table:table-cell office:value-type="float" office:value="8789.0">
            <text:p>8789</text:p>
          </table:table-cell>
          <table:table-cell office:value-type="float" office:value="9726.0">
            <text:p>9726</text:p>
          </table:table-cell>
          <table:table-cell office:value-type="float" office:value="-154228.0">
            <text:p>-154228</text:p>
          </table:table-cell>
          <table:table-cell office:value-type="float" office:value="-429.0">
            <text:p>-429</text:p>
          </table:table-cell>
          <table:table-cell office:value-type="float" office:value="-141936.0">
            <text:p>-141936</text:p>
          </table:table-cell>
          <table:table-cell office:value-type="float" office:value="1526.0">
            <text:p>1526</text:p>
          </table:table-cell>
          <table:table-cell office:value-type="float" office:value="110157.0">
            <text:p>110157</text:p>
          </table:table-cell>
          <table:table-cell office:value-type="float" office:value="19791.0">
            <text:p>19791</text:p>
          </table:table-cell>
          <table:table-cell office:value-type="float" office:value="186007.0">
            <text:p>186007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26625.0">
            <text:p>-26625</text:p>
          </table:table-cell>
          <table:table-cell office:value-type="float" office:value="23945.0">
            <text:p>239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76.0">
            <text:p>-2176</text:p>
          </table:table-cell>
          <table:table-cell office:value-type="float" office:value="-33843.0">
            <text:p>-33843</text:p>
          </table:table-cell>
          <table:table-cell office:value-type="float" office:value="10007.0">
            <text:p>10007</text:p>
          </table:table-cell>
          <table:table-cell office:value-type="float" office:value="-150038.0">
            <text:p>-150038</text:p>
          </table:table-cell>
          <table:table-cell office:value-type="float" office:value="-429.0">
            <text:p>-429</text:p>
          </table:table-cell>
          <table:table-cell office:value-type="float" office:value="-128945.0">
            <text:p>-128945</text:p>
          </table:table-cell>
          <table:table-cell office:value-type="float" office:value="2806.0">
            <text:p>2806</text:p>
          </table:table-cell>
          <table:table-cell office:value-type="float" office:value="107011.0">
            <text:p>107011</text:p>
          </table:table-cell>
          <table:table-cell office:value-type="float" office:value="9898.0">
            <text:p>9898</text:p>
          </table:table-cell>
          <table:table-cell office:value-type="float" office:value="171972.0">
            <text:p>17197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5610.0">
            <text:p>5610</text:p>
          </table:table-cell>
          <table:table-cell office:value-type="float" office:value="-46910.0">
            <text:p>-469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20.0">
            <text:p>1520</text:p>
          </table:table-cell>
          <table:table-cell office:value-type="float" office:value="6356.0">
            <text:p>6356</text:p>
          </table:table-cell>
          <table:table-cell office:value-type="float" office:value="15617.0">
            <text:p>15617</text:p>
          </table:table-cell>
          <table:table-cell office:value-type="float" office:value="-206189.0">
            <text:p>-206189</text:p>
          </table:table-cell>
          <table:table-cell office:value-type="float" office:value="-429.0">
            <text:p>-429</text:p>
          </table:table-cell>
          <table:table-cell office:value-type="float" office:value="-124228.0">
            <text:p>-124228</text:p>
          </table:table-cell>
          <table:table-cell office:value-type="float" office:value="4326.0">
            <text:p>4326</text:p>
          </table:table-cell>
          <table:table-cell office:value-type="float" office:value="111956.0">
            <text:p>111956</text:p>
          </table:table-cell>
          <table:table-cell office:value-type="float" office:value="40554.0">
            <text:p>40554</text:p>
          </table:table-cell>
          <table:table-cell office:value-type="float" office:value="218461.0">
            <text:p>21846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347.0">
            <text:p>-1347</text:p>
          </table:table-cell>
          <table:table-cell office:value-type="float" office:value="-27991.0">
            <text:p>-2799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10.0">
            <text:p>-110</text:p>
          </table:table-cell>
          <table:table-cell office:value-type="float" office:value="-2970.0">
            <text:p>-2970</text:p>
          </table:table-cell>
          <table:table-cell office:value-type="float" office:value="8343.0">
            <text:p>8343</text:p>
          </table:table-cell>
          <table:table-cell office:value-type="float" office:value="-61670.0">
            <text:p>-61670</text:p>
          </table:table-cell>
          <table:table-cell office:value-type="float" office:value="67.0">
            <text:p>67</text:p>
          </table:table-cell>
          <table:table-cell office:value-type="float" office:value="257.0">
            <text:p>257</text:p>
          </table:table-cell>
          <table:table-cell office:value-type="float" office:value="2302.0">
            <text:p>2302</text:p>
          </table:table-cell>
          <table:table-cell office:value-type="float" office:value="60094.0">
            <text:p>60094</text:p>
          </table:table-cell>
          <table:table-cell office:value-type="float" office:value="30961.0">
            <text:p>30961</text:p>
          </table:table-cell>
          <table:table-cell office:value-type="float" office:value="1319.0">
            <text:p>131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4448.0">
            <text:p>-4448</text:p>
          </table:table-cell>
          <table:table-cell office:value-type="float" office:value="48560.0">
            <text:p>48560</text:p>
          </table:table-cell>
          <table:table-cell office:value-type="float" office:value="60.0">
            <text:p>60</text:p>
          </table:table-cell>
          <table:table-cell office:value-type="float" office:value="413.0">
            <text:p>413</text:p>
          </table:table-cell>
          <table:table-cell office:value-type="float" office:value="-1291.0">
            <text:p>-1291</text:p>
          </table:table-cell>
          <table:table-cell office:value-type="float" office:value="-1544.0">
            <text:p>-1544</text:p>
          </table:table-cell>
          <table:table-cell office:value-type="float" office:value="5341.0">
            <text:p>5341</text:p>
          </table:table-cell>
          <table:table-cell office:value-type="float" office:value="-71112.0">
            <text:p>-71112</text:p>
          </table:table-cell>
          <table:table-cell office:value-type="float" office:value="127.0">
            <text:p>127</text:p>
          </table:table-cell>
          <table:table-cell office:value-type="float" office:value="489.0">
            <text:p>489</text:p>
          </table:table-cell>
          <table:table-cell office:value-type="float" office:value="3551.0">
            <text:p>3551</text:p>
          </table:table-cell>
          <table:table-cell office:value-type="float" office:value="80257.0">
            <text:p>80257</text:p>
          </table:table-cell>
          <table:table-cell office:value-type="float" office:value="-47429.0">
            <text:p>-47429</text:p>
          </table:table-cell>
          <table:table-cell office:value-type="float" office:value="-9634.0">
            <text:p>-963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022.0">
            <text:p>2022</text:p>
          </table:table-cell>
          <table:table-cell office:value-type="float" office:value="8755.0">
            <text:p>875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2.0">
            <text:p>522</text:p>
          </table:table-cell>
          <table:table-cell office:value-type="float" office:value="-1780.0">
            <text:p>-1780</text:p>
          </table:table-cell>
          <table:table-cell office:value-type="float" office:value="7363.0">
            <text:p>7363</text:p>
          </table:table-cell>
          <table:table-cell office:value-type="float" office:value="-54097.0">
            <text:p>-54097</text:p>
          </table:table-cell>
          <table:table-cell office:value-type="float" office:value="127.0">
            <text:p>127</text:p>
          </table:table-cell>
          <table:table-cell office:value-type="float" office:value="227.0">
            <text:p>227</text:p>
          </table:table-cell>
          <table:table-cell office:value-type="float" office:value="4073.0">
            <text:p>4073</text:p>
          </table:table-cell>
          <table:table-cell office:value-type="float" office:value="65542.0">
            <text:p>65542</text:p>
          </table:table-cell>
          <table:table-cell office:value-type="float" office:value="-6975.0">
            <text:p>-6975</text:p>
          </table:table-cell>
          <table:table-cell office:value-type="float" office:value="-11672.0">
            <text:p>-11672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749.0">
            <text:p>-1749</text:p>
          </table:table-cell>
          <table:table-cell office:value-type="float" office:value="-24559.0">
            <text:p>-245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.0">
            <text:p>2660</text:p>
          </table:table-cell>
          <table:table-cell office:value-type="float" office:value="16068.0">
            <text:p>16068</text:p>
          </table:table-cell>
          <table:table-cell office:value-type="float" office:value="5614.0">
            <text:p>5614</text:p>
          </table:table-cell>
          <table:table-cell office:value-type="float" office:value="-101894.0">
            <text:p>-101894</text:p>
          </table:table-cell>
          <table:table-cell office:value-type="float" office:value="127.0">
            <text:p>127</text:p>
          </table:table-cell>
          <table:table-cell office:value-type="float" office:value="387.0">
            <text:p>387</text:p>
          </table:table-cell>
          <table:table-cell office:value-type="float" office:value="6733.0">
            <text:p>6733</text:p>
          </table:table-cell>
          <table:table-cell office:value-type="float" office:value="114180.0">
            <text:p>114180</text:p>
          </table:table-cell>
          <table:table-cell office:value-type="float" office:value="8491.0">
            <text:p>8491</text:p>
          </table:table-cell>
          <table:table-cell office:value-type="float" office:value="-12673.0">
            <text:p>-12673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7416.0">
            <text:p>-7416</text:p>
          </table:table-cell>
          <table:table-cell office:value-type="float" office:value="59174.0">
            <text:p>591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41.0">
            <text:p>-3941</text:p>
          </table:table-cell>
          <table:table-cell office:value-type="float" office:value="-14935.0">
            <text:p>-14935</text:p>
          </table:table-cell>
          <table:table-cell office:value-type="float" office:value="7294.0">
            <text:p>7294</text:p>
          </table:table-cell>
          <table:table-cell office:value-type="float" office:value="-62898.0">
            <text:p>-62898</text:p>
          </table:table-cell>
          <table:table-cell office:value-type="float" office:value="127.0">
            <text:p>127</text:p>
          </table:table-cell>
          <table:table-cell office:value-type="float" office:value="260.0">
            <text:p>260</text:p>
          </table:table-cell>
          <table:table-cell office:value-type="float" office:value="4559.0">
            <text:p>4559</text:p>
          </table:table-cell>
          <table:table-cell office:value-type="float" office:value="95327.0">
            <text:p>95327</text:p>
          </table:table-cell>
          <table:table-cell office:value-type="float" office:value="-44239.0">
            <text:p>-44239</text:p>
          </table:table-cell>
          <table:table-cell office:value-type="float" office:value="-32689.0">
            <text:p>-32689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1361.0">
            <text:p>-1361</text:p>
          </table:table-cell>
          <table:table-cell office:value-type="float" office:value="-41271.0">
            <text:p>-4127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207.0">
            <text:p>3207</text:p>
          </table:table-cell>
          <table:table-cell office:value-type="float" office:value="27900.0">
            <text:p>27900</text:p>
          </table:table-cell>
          <table:table-cell office:value-type="float" office:value="5933.0">
            <text:p>5933</text:p>
          </table:table-cell>
          <table:table-cell office:value-type="float" office:value="-100501.0">
            <text:p>-100501</text:p>
          </table:table-cell>
          <table:table-cell office:value-type="float" office:value="127.0">
            <text:p>127</text:p>
          </table:table-cell>
          <table:table-cell office:value-type="float" office:value="184.0">
            <text:p>184</text:p>
          </table:table-cell>
          <table:table-cell office:value-type="float" office:value="7766.0">
            <text:p>7766</text:p>
          </table:table-cell>
          <table:table-cell office:value-type="float" office:value="116585.0">
            <text:p>116585</text:p>
          </table:table-cell>
          <table:table-cell office:value-type="float" office:value="13371.0">
            <text:p>13371</text:p>
          </table:table-cell>
          <table:table-cell office:value-type="float" office:value="-16268.0">
            <text:p>-16268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1147.0">
            <text:p>-1147</text:p>
          </table:table-cell>
          <table:table-cell office:value-type="float" office:value="35317.0">
            <text:p>353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4.0">
            <text:p>3054</text:p>
          </table:table-cell>
          <table:table-cell office:value-type="float" office:value="23324.0">
            <text:p>23324</text:p>
          </table:table-cell>
          <table:table-cell office:value-type="float" office:value="6467.0">
            <text:p>6467</text:p>
          </table:table-cell>
          <table:table-cell office:value-type="float" office:value="-174932.0">
            <text:p>-174932</text:p>
          </table:table-cell>
          <table:table-cell office:value-type="float" office:value="127.0">
            <text:p>127</text:p>
          </table:table-cell>
          <table:table-cell office:value-type="float" office:value="333.0">
            <text:p>333</text:p>
          </table:table-cell>
          <table:table-cell office:value-type="float" office:value="8055.0">
            <text:p>8055</text:p>
          </table:table-cell>
          <table:table-cell office:value-type="float" office:value="182661.0">
            <text:p>182661</text:p>
          </table:table-cell>
          <table:table-cell office:value-type="float" office:value="-58641.0">
            <text:p>-58641</text:p>
          </table:table-cell>
          <table:table-cell office:value-type="float" office:value="-8062.0">
            <text:p>-8062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8592.0">
            <text:p>8592</text:p>
          </table:table-cell>
          <table:table-cell office:value-type="float" office:value="61008.0">
            <text:p>6100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2.0">
            <text:p>202</text:p>
          </table:table-cell>
          <table:table-cell office:value-type="float" office:value="-14211.0">
            <text:p>-14211</text:p>
          </table:table-cell>
          <table:table-cell office:value-type="float" office:value="15059.0">
            <text:p>15059</text:p>
          </table:table-cell>
          <table:table-cell office:value-type="float" office:value="-121766.0">
            <text:p>-121766</text:p>
          </table:table-cell>
          <table:table-cell office:value-type="float" office:value="127.0">
            <text:p>127</text:p>
          </table:table-cell>
          <table:table-cell office:value-type="float" office:value="73.0">
            <text:p>73</text:p>
          </table:table-cell>
          <table:table-cell office:value-type="float" office:value="8257.0">
            <text:p>8257</text:p>
          </table:table-cell>
          <table:table-cell office:value-type="float" office:value="151052.0">
            <text:p>151052</text:p>
          </table:table-cell>
          <table:table-cell office:value-type="float" office:value="-46797.0">
            <text:p>-46797</text:p>
          </table:table-cell>
          <table:table-cell office:value-type="float" office:value="-29359.0">
            <text:p>-2935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1034.0">
            <text:p>-1034</text:p>
          </table:table-cell>
          <table:table-cell office:value-type="float" office:value="-8764509.0">
            <text:p>-8764509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500.0">
            <text:p>-500</text:p>
          </table:table-cell>
          <table:table-cell office:value-type="float" office:value="-4202548.0">
            <text:p>-4202548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26.0">
            <text:p>26</text:p>
          </table:table-cell>
          <table:table-cell office:value-type="float" office:value="230601.0">
            <text:p>230601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384.0">
            <text:p>-384</text:p>
          </table:table-cell>
          <table:table-cell office:value-type="float" office:value="-3183885.0">
            <text:p>-3183885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383.0">
            <text:p>383</text:p>
          </table:table-cell>
          <table:table-cell office:value-type="float" office:value="3210220.0">
            <text:p>3210220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622.0">
            <text:p>622</text:p>
          </table:table-cell>
          <table:table-cell office:value-type="float" office:value="5219361.0">
            <text:p>5219361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734.0">
            <text:p>734</text:p>
          </table:table-cell>
          <table:table-cell office:value-type="float" office:value="6099825.0">
            <text:p>6099825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1550.0">
            <text:p>1550</text:p>
          </table:table-cell>
          <table:table-cell office:value-type="float" office:value="12708480.0">
            <text:p>1270848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