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583.0">
            <text:p>-583</text:p>
          </table:table-cell>
          <table:table-cell office:value-type="float" office:value="-422805.0">
            <text:p>-422805</text:p>
          </table:table-cell>
          <table:table-cell office:value-type="float" office:value="-600.0">
            <text:p>-600</text:p>
          </table:table-cell>
          <table:table-cell office:value-type="float" office:value="-46653.0">
            <text:p>-46653</text:p>
          </table:table-cell>
          <table:table-cell office:value-type="float" office:value="-300.0">
            <text:p>-300</text:p>
          </table:table-cell>
          <table:table-cell office:value-type="float" office:value="12959.0">
            <text:p>12959</text:p>
          </table:table-cell>
          <table:table-cell office:value-type="float" office:value="9779.0">
            <text:p>9779</text:p>
          </table:table-cell>
          <table:table-cell office:value-type="float" office:value="-40242.0">
            <text:p>-40242</text:p>
          </table:table-cell>
          <table:table-cell office:value-type="float" office:value="-1923.0">
            <text:p>-1923</text:p>
          </table:table-cell>
          <table:table-cell office:value-type="float" office:value="-103663.0">
            <text:p>-103663</text:p>
          </table:table-cell>
          <table:table-cell office:value-type="float" office:value="-1920.0">
            <text:p>-1920</text:p>
          </table:table-cell>
          <table:table-cell office:value-type="float" office:value="-171970.0">
            <text:p>-171970</text:p>
          </table:table-cell>
          <table:table-cell office:value-type="float" office:value="456499.0">
            <text:p>456499</text:p>
          </table:table-cell>
          <table:table-cell office:value-type="float" office:value="315875.0">
            <text:p>315875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20418.0">
            <text:p>-20418</text:p>
          </table:table-cell>
          <table:table-cell office:value-type="float" office:value="-118175.0">
            <text:p>-118175</text:p>
          </table:table-cell>
          <table:table-cell office:value-type="float" office:value="-546.0">
            <text:p>-546</text:p>
          </table:table-cell>
          <table:table-cell office:value-type="float" office:value="-64360.0">
            <text:p>-64360</text:p>
          </table:table-cell>
          <table:table-cell office:value-type="float" office:value="-4804.0">
            <text:p>-4804</text:p>
          </table:table-cell>
          <table:table-cell office:value-type="float" office:value="-39166.0">
            <text:p>-39166</text:p>
          </table:table-cell>
          <table:table-cell office:value-type="float" office:value="94.0">
            <text:p>94</text:p>
          </table:table-cell>
          <table:table-cell office:value-type="float" office:value="1017.0">
            <text:p>1017</text:p>
          </table:table-cell>
          <table:table-cell office:value-type="float" office:value="-1819.0">
            <text:p>-1819</text:p>
          </table:table-cell>
          <table:table-cell office:value-type="float" office:value="-74609.0">
            <text:p>-74609</text:p>
          </table:table-cell>
          <table:table-cell office:value-type="float" office:value="-1111.0">
            <text:p>-1111</text:p>
          </table:table-cell>
          <table:table-cell office:value-type="float" office:value="-90697.0">
            <text:p>-90697</text:p>
          </table:table-cell>
          <table:table-cell office:value-type="float" office:value="221701.0">
            <text:p>221701</text:p>
          </table:table-cell>
          <table:table-cell office:value-type="float" office:value="164289.0">
            <text:p>16428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4454.0">
            <text:p>4454</text:p>
          </table:table-cell>
          <table:table-cell office:value-type="float" office:value="15664.0">
            <text:p>15664</text:p>
          </table:table-cell>
          <table:table-cell office:value-type="float" office:value="100.0">
            <text:p>100</text:p>
          </table:table-cell>
          <table:table-cell office:value-type="float" office:value="87.0">
            <text:p>87</text:p>
          </table:table-cell>
          <table:table-cell office:value-type="float" office:value="1947.0">
            <text:p>1947</text:p>
          </table:table-cell>
          <table:table-cell office:value-type="float" office:value="-8323.0">
            <text:p>-8323</text:p>
          </table:table-cell>
          <table:table-cell office:value-type="float" office:value="9446.0">
            <text:p>9446</text:p>
          </table:table-cell>
          <table:table-cell office:value-type="float" office:value="24007.0">
            <text:p>24007</text:p>
          </table:table-cell>
          <table:table-cell office:value-type="float" office:value="106.0">
            <text:p>106</text:p>
          </table:table-cell>
          <table:table-cell office:value-type="float" office:value="443.0">
            <text:p>443</text:p>
          </table:table-cell>
          <table:table-cell office:value-type="float" office:value="5086.0">
            <text:p>5086</text:p>
          </table:table-cell>
          <table:table-cell office:value-type="float" office:value="66597.0">
            <text:p>66597</text:p>
          </table:table-cell>
          <table:table-cell office:value-type="float" office:value="-7428.0">
            <text:p>-7428</text:p>
          </table:table-cell>
          <table:table-cell office:value-type="float" office:value="-91047.0">
            <text:p>-91047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646.0">
            <text:p>646</text:p>
          </table:table-cell>
          <table:table-cell office:value-type="float" office:value="194016.0">
            <text:p>194016</text:p>
          </table:table-cell>
          <table:table-cell office:value-type="float" office:value="118.0">
            <text:p>118</text:p>
          </table:table-cell>
          <table:table-cell office:value-type="float" office:value="1515.0">
            <text:p>1515</text:p>
          </table:table-cell>
          <table:table-cell office:value-type="float" office:value="1379.0">
            <text:p>1379</text:p>
          </table:table-cell>
          <table:table-cell office:value-type="float" office:value="72375.0">
            <text:p>72375</text:p>
          </table:table-cell>
          <table:table-cell office:value-type="float" office:value="7416.0">
            <text:p>7416</text:p>
          </table:table-cell>
          <table:table-cell office:value-type="float" office:value="353671.0">
            <text:p>353671</text:p>
          </table:table-cell>
          <table:table-cell office:value-type="float" office:value="124.0">
            <text:p>124</text:p>
          </table:table-cell>
          <table:table-cell office:value-type="float" office:value="5135.0">
            <text:p>5135</text:p>
          </table:table-cell>
          <table:table-cell office:value-type="float" office:value="3341.0">
            <text:p>3341</text:p>
          </table:table-cell>
          <table:table-cell office:value-type="float" office:value="166555.0">
            <text:p>166555</text:p>
          </table:table-cell>
          <table:table-cell office:value-type="float" office:value="-267906.0">
            <text:p>-267906</text:p>
          </table:table-cell>
          <table:table-cell office:value-type="float" office:value="-525361.0">
            <text:p>-52536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657.0">
            <text:p>657</text:p>
          </table:table-cell>
          <table:table-cell office:value-type="float" office:value="6026859.0">
            <text:p>6026859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4666.0">
            <text:p>4666</text:p>
          </table:table-cell>
          <table:table-cell office:value-type="float" office:value="39787584.0">
            <text:p>3978758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