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1449.0">
            <text:p>-1449</text:p>
          </table:table-cell>
          <table:table-cell office:value-type="float" office:value="-24859.0">
            <text:p>-24859</text:p>
          </table:table-cell>
          <table:table-cell office:value-type="float" office:value="-100.0">
            <text:p>-100</text:p>
          </table:table-cell>
          <table:table-cell office:value-type="float" office:value="-740.0">
            <text:p>-740</text:p>
          </table:table-cell>
          <table:table-cell office:value-type="float" office:value="71.0">
            <text:p>71</text:p>
          </table:table-cell>
          <table:table-cell office:value-type="float" office:value="-11588.0">
            <text:p>-11588</text:p>
          </table:table-cell>
          <table:table-cell office:value-type="float" office:value="14168.0">
            <text:p>14168</text:p>
          </table:table-cell>
          <table:table-cell office:value-type="float" office:value="-226463.0">
            <text:p>-226463</text:p>
          </table:table-cell>
          <table:table-cell office:value-type="float" office:value="-529.0">
            <text:p>-529</text:p>
          </table:table-cell>
          <table:table-cell office:value-type="float" office:value="-113067.0">
            <text:p>-113067</text:p>
          </table:table-cell>
          <table:table-cell office:value-type="float" office:value="4397.0">
            <text:p>4397</text:p>
          </table:table-cell>
          <table:table-cell office:value-type="float" office:value="116104.0">
            <text:p>116104</text:p>
          </table:table-cell>
          <table:table-cell office:value-type="float" office:value="37187.0">
            <text:p>37187</text:p>
          </table:table-cell>
          <table:table-cell office:value-type="float" office:value="223426.0">
            <text:p>22342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8500.0">
            <text:p>-18500</text:p>
          </table:table-cell>
          <table:table-cell office:value-type="float" office:value="48891.0">
            <text:p>48891</text:p>
          </table:table-cell>
          <table:table-cell office:value-type="float" office:value="7.0">
            <text:p>7</text:p>
          </table:table-cell>
          <table:table-cell office:value-type="float" office:value="468.0">
            <text:p>468</text:p>
          </table:table-cell>
          <table:table-cell office:value-type="float" office:value="-2750.0">
            <text:p>-2750</text:p>
          </table:table-cell>
          <table:table-cell office:value-type="float" office:value="-71238.0">
            <text:p>-71238</text:p>
          </table:table-cell>
          <table:table-cell office:value-type="float" office:value="-679.0">
            <text:p>-679</text:p>
          </table:table-cell>
          <table:table-cell office:value-type="float" office:value="-391441.0">
            <text:p>-391441</text:p>
          </table:table-cell>
          <table:table-cell office:value-type="float" office:value="-10.0">
            <text:p>-10</text:p>
          </table:table-cell>
          <table:table-cell office:value-type="float" office:value="-945.0">
            <text:p>-945</text:p>
          </table:table-cell>
          <table:table-cell office:value-type="float" office:value="1472.0">
            <text:p>1472</text:p>
          </table:table-cell>
          <table:table-cell office:value-type="float" office:value="551059.0">
            <text:p>551059</text:p>
          </table:table-cell>
          <table:table-cell office:value-type="float" office:value="21879.0">
            <text:p>21879</text:p>
          </table:table-cell>
          <table:table-cell office:value-type="float" office:value="-158673.0">
            <text:p>-158673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5163.0">
            <text:p>5163</text:p>
          </table:table-cell>
          <table:table-cell office:value-type="float" office:value="-135887.0">
            <text:p>-135887</text:p>
          </table:table-cell>
          <table:table-cell office:value-type="float" office:value="-340.0">
            <text:p>-340</text:p>
          </table:table-cell>
          <table:table-cell office:value-type="float" office:value="-25514.0">
            <text:p>-25514</text:p>
          </table:table-cell>
          <table:table-cell office:value-type="float" office:value="737.0">
            <text:p>737</text:p>
          </table:table-cell>
          <table:table-cell office:value-type="float" office:value="10315.0">
            <text:p>10315</text:p>
          </table:table-cell>
          <table:table-cell office:value-type="float" office:value="4484.0">
            <text:p>4484</text:p>
          </table:table-cell>
          <table:table-cell office:value-type="float" office:value="-562197.0">
            <text:p>-562197</text:p>
          </table:table-cell>
          <table:table-cell office:value-type="float" office:value="-350.0">
            <text:p>-350</text:p>
          </table:table-cell>
          <table:table-cell office:value-type="float" office:value="-27733.0">
            <text:p>-27733</text:p>
          </table:table-cell>
          <table:table-cell office:value-type="float" office:value="2209.0">
            <text:p>2209</text:p>
          </table:table-cell>
          <table:table-cell office:value-type="float" office:value="619157.0">
            <text:p>619157</text:p>
          </table:table-cell>
          <table:table-cell office:value-type="float" office:value="151086.0">
            <text:p>151086</text:p>
          </table:table-cell>
          <table:table-cell office:value-type="float" office:value="-29227.0">
            <text:p>-29227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392.0">
            <text:p>-392</text:p>
          </table:table-cell>
          <table:table-cell office:value-type="float" office:value="17403.0">
            <text:p>174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11.0">
            <text:p>811</text:p>
          </table:table-cell>
          <table:table-cell office:value-type="float" office:value="-3929.0">
            <text:p>-3929</text:p>
          </table:table-cell>
          <table:table-cell office:value-type="float" office:value="14667.0">
            <text:p>14667</text:p>
          </table:table-cell>
          <table:table-cell office:value-type="float" office:value="-120313.0">
            <text:p>-120313</text:p>
          </table:table-cell>
          <table:table-cell office:value-type="float" office:value="127.0">
            <text:p>127</text:p>
          </table:table-cell>
          <table:table-cell office:value-type="float" office:value="37.0">
            <text:p>37</text:p>
          </table:table-cell>
          <table:table-cell office:value-type="float" office:value="9068.0">
            <text:p>9068</text:p>
          </table:table-cell>
          <table:table-cell office:value-type="float" office:value="181183.0">
            <text:p>181183</text:p>
          </table:table-cell>
          <table:table-cell office:value-type="float" office:value="-13474.0">
            <text:p>-13474</text:p>
          </table:table-cell>
          <table:table-cell office:value-type="float" office:value="-60907.0">
            <text:p>-60907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10801.0">
            <text:p>-10801</text:p>
          </table:table-cell>
          <table:table-cell office:value-type="float" office:value="76437.0">
            <text:p>76437</text:p>
          </table:table-cell>
          <table:table-cell office:value-type="float" office:value="13.0">
            <text:p>13</text:p>
          </table:table-cell>
          <table:table-cell office:value-type="float" office:value="800.0">
            <text:p>800</text:p>
          </table:table-cell>
          <table:table-cell office:value-type="float" office:value="631.0">
            <text:p>631</text:p>
          </table:table-cell>
          <table:table-cell office:value-type="float" office:value="-8612.0">
            <text:p>-8612</text:p>
          </table:table-cell>
          <table:table-cell office:value-type="float" office:value="470.0">
            <text:p>470</text:p>
          </table:table-cell>
          <table:table-cell office:value-type="float" office:value="-48995.0">
            <text:p>-48995</text:p>
          </table:table-cell>
          <table:table-cell office:value-type="float" office:value="13.0">
            <text:p>13</text:p>
          </table:table-cell>
          <table:table-cell office:value-type="float" office:value="822.0">
            <text:p>822</text:p>
          </table:table-cell>
          <table:table-cell office:value-type="float" office:value="3832.0">
            <text:p>3832</text:p>
          </table:table-cell>
          <table:table-cell office:value-type="float" office:value="113860.0">
            <text:p>113860</text:p>
          </table:table-cell>
          <table:table-cell office:value-type="float" office:value="-68625.0">
            <text:p>-68625</text:p>
          </table:table-cell>
          <table:table-cell office:value-type="float" office:value="-65687.0">
            <text:p>-65687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4481.0">
            <text:p>4481</text:p>
          </table:table-cell>
          <table:table-cell office:value-type="float" office:value="-12415.0">
            <text:p>-124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13581.0">
            <text:p>-13581</text:p>
          </table:table-cell>
          <table:table-cell office:value-type="float" office:value="4951.0">
            <text:p>4951</text:p>
          </table:table-cell>
          <table:table-cell office:value-type="float" office:value="-24032.0">
            <text:p>-24032</text:p>
          </table:table-cell>
          <table:table-cell office:value-type="float" office:value="13.0">
            <text:p>13</text:p>
          </table:table-cell>
          <table:table-cell office:value-type="float" office:value="503.0">
            <text:p>503</text:p>
          </table:table-cell>
          <table:table-cell office:value-type="float" office:value="3670.0">
            <text:p>3670</text:p>
          </table:table-cell>
          <table:table-cell office:value-type="float" office:value="60217.0">
            <text:p>60217</text:p>
          </table:table-cell>
          <table:table-cell office:value-type="float" office:value="25996.0">
            <text:p>25996</text:p>
          </table:table-cell>
          <table:table-cell office:value-type="float" office:value="-36688.0">
            <text:p>-36688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2612.0">
            <text:p>2612</text:p>
          </table:table-cell>
          <table:table-cell office:value-type="float" office:value="21100898.0">
            <text:p>21100898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2448.0">
            <text:p>2448</text:p>
          </table:table-cell>
          <table:table-cell office:value-type="float" office:value="19629711.0">
            <text:p>19629711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1255.0">
            <text:p>1255</text:p>
          </table:table-cell>
          <table:table-cell office:value-type="float" office:value="10403570.0">
            <text:p>1040357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