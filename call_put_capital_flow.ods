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2708.0">
            <text:p>-2708</text:p>
          </table:table-cell>
          <table:table-cell office:value-type="float" office:value="48851.0">
            <text:p>48851</text:p>
          </table:table-cell>
          <table:table-cell office:value-type="float" office:value="-128.0">
            <text:p>-128</text:p>
          </table:table-cell>
          <table:table-cell office:value-type="float" office:value="-6603.0">
            <text:p>-6603</text:p>
          </table:table-cell>
          <table:table-cell office:value-type="float" office:value="-2369.0">
            <text:p>-2369</text:p>
          </table:table-cell>
          <table:table-cell office:value-type="float" office:value="-2307.0">
            <text:p>-2307</text:p>
          </table:table-cell>
          <table:table-cell office:value-type="float" office:value="561.0">
            <text:p>561</text:p>
          </table:table-cell>
          <table:table-cell office:value-type="float" office:value="-244078.0">
            <text:p>-244078</text:p>
          </table:table-cell>
          <table:table-cell office:value-type="float" office:value="-1435.0">
            <text:p>-1435</text:p>
          </table:table-cell>
          <table:table-cell office:value-type="float" office:value="-136681.0">
            <text:p>-136681</text:p>
          </table:table-cell>
          <table:table-cell office:value-type="float" office:value="-507.0">
            <text:p>-507</text:p>
          </table:table-cell>
          <table:table-cell office:value-type="float" office:value="-338773.0">
            <text:p>-338773</text:p>
          </table:table-cell>
          <table:table-cell office:value-type="float" office:value="-39941.0">
            <text:p>-39941</text:p>
          </table:table-cell>
          <table:table-cell office:value-type="float" office:value="719532.0">
            <text:p>719532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824.0">
            <text:p>824</text:p>
          </table:table-cell>
          <table:table-cell office:value-type="float" office:value="-70316.0">
            <text:p>-70316</text:p>
          </table:table-cell>
          <table:table-cell office:value-type="float" office:value="-150.0">
            <text:p>-150</text:p>
          </table:table-cell>
          <table:table-cell office:value-type="float" office:value="-6543.0">
            <text:p>-6543</text:p>
          </table:table-cell>
          <table:table-cell office:value-type="float" office:value="-154.0">
            <text:p>-154</text:p>
          </table:table-cell>
          <table:table-cell office:value-type="float" office:value="-17665.0">
            <text:p>-17665</text:p>
          </table:table-cell>
          <table:table-cell office:value-type="float" office:value="1385.0">
            <text:p>1385</text:p>
          </table:table-cell>
          <table:table-cell office:value-type="float" office:value="-252729.0">
            <text:p>-252729</text:p>
          </table:table-cell>
          <table:table-cell office:value-type="float" office:value="-1585.0">
            <text:p>-1585</text:p>
          </table:table-cell>
          <table:table-cell office:value-type="float" office:value="-110241.0">
            <text:p>-110241</text:p>
          </table:table-cell>
          <table:table-cell office:value-type="float" office:value="-661.0">
            <text:p>-661</text:p>
          </table:table-cell>
          <table:table-cell office:value-type="float" office:value="-317132.0">
            <text:p>-317132</text:p>
          </table:table-cell>
          <table:table-cell office:value-type="float" office:value="94524.0">
            <text:p>94524</text:p>
          </table:table-cell>
          <table:table-cell office:value-type="float" office:value="680102.0">
            <text:p>680102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2486.0">
            <text:p>2486</text:p>
          </table:table-cell>
          <table:table-cell office:value-type="float" office:value="121174.0">
            <text:p>121174</text:p>
          </table:table-cell>
          <table:table-cell office:value-type="float" office:value="-800.0">
            <text:p>-800</text:p>
          </table:table-cell>
          <table:table-cell office:value-type="float" office:value="-63497.0">
            <text:p>-63497</text:p>
          </table:table-cell>
          <table:table-cell office:value-type="float" office:value="-463.0">
            <text:p>-463</text:p>
          </table:table-cell>
          <table:table-cell office:value-type="float" office:value="-4850.0">
            <text:p>-4850</text:p>
          </table:table-cell>
          <table:table-cell office:value-type="float" office:value="-1490.0">
            <text:p>-1490</text:p>
          </table:table-cell>
          <table:table-cell office:value-type="float" office:value="-282235.0">
            <text:p>-282235</text:p>
          </table:table-cell>
          <table:table-cell office:value-type="float" office:value="-1535.0">
            <text:p>-1535</text:p>
          </table:table-cell>
          <table:table-cell office:value-type="float" office:value="-103222.0">
            <text:p>-103222</text:p>
          </table:table-cell>
          <table:table-cell office:value-type="float" office:value="-641.0">
            <text:p>-641</text:p>
          </table:table-cell>
          <table:table-cell office:value-type="float" office:value="-345818.0">
            <text:p>-345818</text:p>
          </table:table-cell>
          <table:table-cell office:value-type="float" office:value="-52827.0">
            <text:p>-52827</text:p>
          </table:table-cell>
          <table:table-cell office:value-type="float" office:value="731275.0">
            <text:p>731275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4685.0">
            <text:p>4685</text:p>
          </table:table-cell>
          <table:table-cell office:value-type="float" office:value="85187.0">
            <text:p>85187</text:p>
          </table:table-cell>
          <table:table-cell office:value-type="float" office:value="-95.0">
            <text:p>-95</text:p>
          </table:table-cell>
          <table:table-cell office:value-type="float" office:value="-4144.0">
            <text:p>-4144</text:p>
          </table:table-cell>
          <table:table-cell office:value-type="float" office:value="922.0">
            <text:p>922</text:p>
          </table:table-cell>
          <table:table-cell office:value-type="float" office:value="-112.0">
            <text:p>-112</text:p>
          </table:table-cell>
          <table:table-cell office:value-type="float" office:value="3697.0">
            <text:p>3697</text:p>
          </table:table-cell>
          <table:table-cell office:value-type="float" office:value="-173621.0">
            <text:p>-173621</text:p>
          </table:table-cell>
          <table:table-cell office:value-type="float" office:value="-1635.0">
            <text:p>-1635</text:p>
          </table:table-cell>
          <table:table-cell office:value-type="float" office:value="-96105.0">
            <text:p>-96105</text:p>
          </table:table-cell>
          <table:table-cell office:value-type="float" office:value="194.0">
            <text:p>194</text:p>
          </table:table-cell>
          <table:table-cell office:value-type="float" office:value="-334736.0">
            <text:p>-334736</text:p>
          </table:table-cell>
          <table:table-cell office:value-type="float" office:value="-80931.0">
            <text:p>-80931</text:p>
          </table:table-cell>
          <table:table-cell office:value-type="float" office:value="604462.0">
            <text:p>604462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1037.0">
            <text:p>1037</text:p>
          </table:table-cell>
          <table:table-cell office:value-type="float" office:value="-5519.0">
            <text:p>-5519</text:p>
          </table:table-cell>
          <table:table-cell office:value-type="float" office:value="-100.0">
            <text:p>-100</text:p>
          </table:table-cell>
          <table:table-cell office:value-type="float" office:value="-3727.0">
            <text:p>-3727</text:p>
          </table:table-cell>
          <table:table-cell office:value-type="float" office:value="486.0">
            <text:p>486</text:p>
          </table:table-cell>
          <table:table-cell office:value-type="float" office:value="-2686.0">
            <text:p>-2686</text:p>
          </table:table-cell>
          <table:table-cell office:value-type="float" office:value="4734.0">
            <text:p>4734</text:p>
          </table:table-cell>
          <table:table-cell office:value-type="float" office:value="-90263.0">
            <text:p>-90263</text:p>
          </table:table-cell>
          <table:table-cell office:value-type="float" office:value="-1735.0">
            <text:p>-1735</text:p>
          </table:table-cell>
          <table:table-cell office:value-type="float" office:value="-43705.0">
            <text:p>-43705</text:p>
          </table:table-cell>
          <table:table-cell office:value-type="float" office:value="680.0">
            <text:p>680</text:p>
          </table:table-cell>
          <table:table-cell office:value-type="float" office:value="-267453.0">
            <text:p>-267453</text:p>
          </table:table-cell>
          <table:table-cell office:value-type="float" office:value="11932.0">
            <text:p>11932</text:p>
          </table:table-cell>
          <table:table-cell office:value-type="float" office:value="401421.0">
            <text:p>40142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7815.0">
            <text:p>-17815</text:p>
          </table:table-cell>
          <table:table-cell office:value-type="float" office:value="81102.0">
            <text:p>81102</text:p>
          </table:table-cell>
          <table:table-cell office:value-type="float" office:value="-600.0">
            <text:p>-600</text:p>
          </table:table-cell>
          <table:table-cell office:value-type="float" office:value="-50693.0">
            <text:p>-50693</text:p>
          </table:table-cell>
          <table:table-cell office:value-type="float" office:value="-1063.0">
            <text:p>-1063</text:p>
          </table:table-cell>
          <table:table-cell office:value-type="float" office:value="-24349.0">
            <text:p>-24349</text:p>
          </table:table-cell>
          <table:table-cell office:value-type="float" office:value="2643.0">
            <text:p>2643</text:p>
          </table:table-cell>
          <table:table-cell office:value-type="float" office:value="2231.0">
            <text:p>2231</text:p>
          </table:table-cell>
          <table:table-cell office:value-type="float" office:value="-1685.0">
            <text:p>-1685</text:p>
          </table:table-cell>
          <table:table-cell office:value-type="float" office:value="-77569.0">
            <text:p>-77569</text:p>
          </table:table-cell>
          <table:table-cell office:value-type="float" office:value="599.0">
            <text:p>599</text:p>
          </table:table-cell>
          <table:table-cell office:value-type="float" office:value="-258779.0">
            <text:p>-258779</text:p>
          </table:table-cell>
          <table:table-cell office:value-type="float" office:value="-6060.0">
            <text:p>-6060</text:p>
          </table:table-cell>
          <table:table-cell office:value-type="float" office:value="334117.0">
            <text:p>334117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6526.0">
            <text:p>6526</text:p>
          </table:table-cell>
          <table:table-cell office:value-type="float" office:value="69288.0">
            <text:p>69288</text:p>
          </table:table-cell>
          <table:table-cell office:value-type="float" office:value="-27.0">
            <text:p>-27</text:p>
          </table:table-cell>
          <table:table-cell office:value-type="float" office:value="-14591.0">
            <text:p>-14591</text:p>
          </table:table-cell>
          <table:table-cell office:value-type="float" office:value="-406.0">
            <text:p>-406</text:p>
          </table:table-cell>
          <table:table-cell office:value-type="float" office:value="-29305.0">
            <text:p>-29305</text:p>
          </table:table-cell>
          <table:table-cell office:value-type="float" office:value="9169.0">
            <text:p>9169</text:p>
          </table:table-cell>
          <table:table-cell office:value-type="float" office:value="72256.0">
            <text:p>72256</text:p>
          </table:table-cell>
          <table:table-cell office:value-type="float" office:value="-1712.0">
            <text:p>-1712</text:p>
          </table:table-cell>
          <table:table-cell office:value-type="float" office:value="-85587.0">
            <text:p>-85587</text:p>
          </table:table-cell>
          <table:table-cell office:value-type="float" office:value="193.0">
            <text:p>193</text:p>
          </table:table-cell>
          <table:table-cell office:value-type="float" office:value="-280448.0">
            <text:p>-280448</text:p>
          </table:table-cell>
          <table:table-cell office:value-type="float" office:value="-25392.0">
            <text:p>-25392</text:p>
          </table:table-cell>
          <table:table-cell office:value-type="float" office:value="293779.0">
            <text:p>293779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2745.0">
            <text:p>-2745</text:p>
          </table:table-cell>
          <table:table-cell office:value-type="float" office:value="62141.0">
            <text:p>62141</text:p>
          </table:table-cell>
          <table:table-cell office:value-type="float" office:value="-430.0">
            <text:p>-430</text:p>
          </table:table-cell>
          <table:table-cell office:value-type="float" office:value="-32023.0">
            <text:p>-32023</text:p>
          </table:table-cell>
          <table:table-cell office:value-type="float" office:value="698.0">
            <text:p>698</text:p>
          </table:table-cell>
          <table:table-cell office:value-type="float" office:value="-1160.0">
            <text:p>-1160</text:p>
          </table:table-cell>
          <table:table-cell office:value-type="float" office:value="7005.0">
            <text:p>7005</text:p>
          </table:table-cell>
          <table:table-cell office:value-type="float" office:value="64351.0">
            <text:p>64351</text:p>
          </table:table-cell>
          <table:table-cell office:value-type="float" office:value="-1652.0">
            <text:p>-1652</text:p>
          </table:table-cell>
          <table:table-cell office:value-type="float" office:value="-76558.0">
            <text:p>-76558</text:p>
          </table:table-cell>
          <table:table-cell office:value-type="float" office:value="1159.0">
            <text:p>1159</text:p>
          </table:table-cell>
          <table:table-cell office:value-type="float" office:value="-261487.0">
            <text:p>-261487</text:p>
          </table:table-cell>
          <table:table-cell office:value-type="float" office:value="-28958.0">
            <text:p>-28958</text:p>
          </table:table-cell>
          <table:table-cell office:value-type="float" office:value="273694.0">
            <text:p>273694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5429.0">
            <text:p>5429</text:p>
          </table:table-cell>
          <table:table-cell office:value-type="float" office:value="20418.0">
            <text:p>20418</text:p>
          </table:table-cell>
          <table:table-cell office:value-type="float" office:value="10.0">
            <text:p>10</text:p>
          </table:table-cell>
          <table:table-cell office:value-type="float" office:value="-38214.0">
            <text:p>-38214</text:p>
          </table:table-cell>
          <table:table-cell office:value-type="float" office:value="1174.0">
            <text:p>1174</text:p>
          </table:table-cell>
          <table:table-cell office:value-type="float" office:value="1809.0">
            <text:p>1809</text:p>
          </table:table-cell>
          <table:table-cell office:value-type="float" office:value="12434.0">
            <text:p>12434</text:p>
          </table:table-cell>
          <table:table-cell office:value-type="float" office:value="95126.0">
            <text:p>95126</text:p>
          </table:table-cell>
          <table:table-cell office:value-type="float" office:value="-1642.0">
            <text:p>-1642</text:p>
          </table:table-cell>
          <table:table-cell office:value-type="float" office:value="-84727.0">
            <text:p>-84727</text:p>
          </table:table-cell>
          <table:table-cell office:value-type="float" office:value="2333.0">
            <text:p>2333</text:p>
          </table:table-cell>
          <table:table-cell office:value-type="float" office:value="-201708.0">
            <text:p>-201708</text:p>
          </table:table-cell>
          <table:table-cell office:value-type="float" office:value="15987.0">
            <text:p>15987</text:p>
          </table:table-cell>
          <table:table-cell office:value-type="float" office:value="191309.0">
            <text:p>191309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3103.0">
            <text:p>-3103</text:p>
          </table:table-cell>
          <table:table-cell office:value-type="float" office:value="158770.0">
            <text:p>158770</text:p>
          </table:table-cell>
          <table:table-cell office:value-type="float" office:value="-959.0">
            <text:p>-959</text:p>
          </table:table-cell>
          <table:table-cell office:value-type="float" office:value="-62904.0">
            <text:p>-62904</text:p>
          </table:table-cell>
          <table:table-cell office:value-type="float" office:value="-528.0">
            <text:p>-528</text:p>
          </table:table-cell>
          <table:table-cell office:value-type="float" office:value="-49315.0">
            <text:p>-49315</text:p>
          </table:table-cell>
          <table:table-cell office:value-type="float" office:value="10362.0">
            <text:p>10362</text:p>
          </table:table-cell>
          <table:table-cell office:value-type="float" office:value="385219.0">
            <text:p>385219</text:p>
          </table:table-cell>
          <table:table-cell office:value-type="float" office:value="-1323.0">
            <text:p>-1323</text:p>
          </table:table-cell>
          <table:table-cell office:value-type="float" office:value="-74867.0">
            <text:p>-74867</text:p>
          </table:table-cell>
          <table:table-cell office:value-type="float" office:value="-1620.0">
            <text:p>-1620</text:p>
          </table:table-cell>
          <table:table-cell office:value-type="float" office:value="-197741.0">
            <text:p>-197741</text:p>
          </table:table-cell>
          <table:table-cell office:value-type="float" office:value="-46551.0">
            <text:p>-46551</text:p>
          </table:table-cell>
          <table:table-cell office:value-type="float" office:value="-112611.0">
            <text:p>-11261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-583.0">
            <text:p>-583</text:p>
          </table:table-cell>
          <table:table-cell office:value-type="float" office:value="-422805.0">
            <text:p>-422805</text:p>
          </table:table-cell>
          <table:table-cell office:value-type="float" office:value="-600.0">
            <text:p>-600</text:p>
          </table:table-cell>
          <table:table-cell office:value-type="float" office:value="-46653.0">
            <text:p>-46653</text:p>
          </table:table-cell>
          <table:table-cell office:value-type="float" office:value="-300.0">
            <text:p>-300</text:p>
          </table:table-cell>
          <table:table-cell office:value-type="float" office:value="12959.0">
            <text:p>12959</text:p>
          </table:table-cell>
          <table:table-cell office:value-type="float" office:value="9779.0">
            <text:p>9779</text:p>
          </table:table-cell>
          <table:table-cell office:value-type="float" office:value="-40242.0">
            <text:p>-40242</text:p>
          </table:table-cell>
          <table:table-cell office:value-type="float" office:value="-1923.0">
            <text:p>-1923</text:p>
          </table:table-cell>
          <table:table-cell office:value-type="float" office:value="-103663.0">
            <text:p>-103663</text:p>
          </table:table-cell>
          <table:table-cell office:value-type="float" office:value="-1920.0">
            <text:p>-1920</text:p>
          </table:table-cell>
          <table:table-cell office:value-type="float" office:value="-171970.0">
            <text:p>-171970</text:p>
          </table:table-cell>
          <table:table-cell office:value-type="float" office:value="456499.0">
            <text:p>456499</text:p>
          </table:table-cell>
          <table:table-cell office:value-type="float" office:value="315875.0">
            <text:p>315875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-20418.0">
            <text:p>-20418</text:p>
          </table:table-cell>
          <table:table-cell office:value-type="float" office:value="-118175.0">
            <text:p>-118175</text:p>
          </table:table-cell>
          <table:table-cell office:value-type="float" office:value="-546.0">
            <text:p>-546</text:p>
          </table:table-cell>
          <table:table-cell office:value-type="float" office:value="-64360.0">
            <text:p>-64360</text:p>
          </table:table-cell>
          <table:table-cell office:value-type="float" office:value="-4804.0">
            <text:p>-4804</text:p>
          </table:table-cell>
          <table:table-cell office:value-type="float" office:value="-39166.0">
            <text:p>-39166</text:p>
          </table:table-cell>
          <table:table-cell office:value-type="float" office:value="94.0">
            <text:p>94</text:p>
          </table:table-cell>
          <table:table-cell office:value-type="float" office:value="1017.0">
            <text:p>1017</text:p>
          </table:table-cell>
          <table:table-cell office:value-type="float" office:value="-1819.0">
            <text:p>-1819</text:p>
          </table:table-cell>
          <table:table-cell office:value-type="float" office:value="-74609.0">
            <text:p>-74609</text:p>
          </table:table-cell>
          <table:table-cell office:value-type="float" office:value="-1111.0">
            <text:p>-1111</text:p>
          </table:table-cell>
          <table:table-cell office:value-type="float" office:value="-90697.0">
            <text:p>-90697</text:p>
          </table:table-cell>
          <table:table-cell office:value-type="float" office:value="221701.0">
            <text:p>221701</text:p>
          </table:table-cell>
          <table:table-cell office:value-type="float" office:value="164289.0">
            <text:p>164289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3698.0">
            <text:p>3698</text:p>
          </table:table-cell>
          <table:table-cell office:value-type="float" office:value="-84554.0">
            <text:p>-84554</text:p>
          </table:table-cell>
          <table:table-cell office:value-type="float" office:value="4.0">
            <text:p>4</text:p>
          </table:table-cell>
          <table:table-cell office:value-type="float" office:value="340.0">
            <text:p>340</text:p>
          </table:table-cell>
          <table:table-cell office:value-type="float" office:value="505.0">
            <text:p>505</text:p>
          </table:table-cell>
          <table:table-cell office:value-type="float" office:value="6464.0">
            <text:p>6464</text:p>
          </table:table-cell>
          <table:table-cell office:value-type="float" office:value="3792.0">
            <text:p>3792</text:p>
          </table:table-cell>
          <table:table-cell office:value-type="float" office:value="-71607.0">
            <text:p>-71607</text:p>
          </table:table-cell>
          <table:table-cell office:value-type="float" office:value="-1815.0">
            <text:p>-1815</text:p>
          </table:table-cell>
          <table:table-cell office:value-type="float" office:value="-62526.0">
            <text:p>-62526</text:p>
          </table:table-cell>
          <table:table-cell office:value-type="float" office:value="-606.0">
            <text:p>-606</text:p>
          </table:table-cell>
          <table:table-cell office:value-type="float" office:value="-79138.0">
            <text:p>-79138</text:p>
          </table:table-cell>
          <table:table-cell office:value-type="float" office:value="77750.0">
            <text:p>77750</text:p>
          </table:table-cell>
          <table:table-cell office:value-type="float" office:value="213271.0">
            <text:p>213271</text:p>
          </table:table-cell>
        </table:table-row>
        <table:table-row>
          <table:table-cell office:value-type="string" office:string-value="2026/07/21">
            <text:p>2026/07/21</text:p>
          </table:table-cell>
          <table:table-cell office:value-type="float" office:value="3343.0">
            <text:p>3343</text:p>
          </table:table-cell>
          <table:table-cell office:value-type="float" office:value="173085.0">
            <text:p>173085</text:p>
          </table:table-cell>
          <table:table-cell office:value-type="float" office:value="-158.0">
            <text:p>-158</text:p>
          </table:table-cell>
          <table:table-cell office:value-type="float" office:value="-8846.0">
            <text:p>-8846</text:p>
          </table:table-cell>
          <table:table-cell office:value-type="float" office:value="1521.0">
            <text:p>1521</text:p>
          </table:table-cell>
          <table:table-cell office:value-type="float" office:value="43125.0">
            <text:p>43125</text:p>
          </table:table-cell>
          <table:table-cell office:value-type="float" office:value="7135.0">
            <text:p>7135</text:p>
          </table:table-cell>
          <table:table-cell office:value-type="float" office:value="37481.0">
            <text:p>37481</text:p>
          </table:table-cell>
          <table:table-cell office:value-type="float" office:value="-1973.0">
            <text:p>-1973</text:p>
          </table:table-cell>
          <table:table-cell office:value-type="float" office:value="-155325.0">
            <text:p>-155325</text:p>
          </table:table-cell>
          <table:table-cell office:value-type="float" office:value="915.0">
            <text:p>915</text:p>
          </table:table-cell>
          <table:table-cell office:value-type="float" office:value="-43541.0">
            <text:p>-43541</text:p>
          </table:table-cell>
          <table:table-cell office:value-type="float" office:value="-207364.0">
            <text:p>-207364</text:p>
          </table:table-cell>
          <table:table-cell office:value-type="float" office:value="161385.0">
            <text:p>161385</text:p>
          </table:table-cell>
        </table:table-row>
        <table:table-row>
          <table:table-cell office:value-type="string" office:string-value="2026/07/22">
            <text:p>2026/07/22</text:p>
          </table:table-cell>
          <table:table-cell office:value-type="float" office:value="-4866.0">
            <text:p>-4866</text:p>
          </table:table-cell>
          <table:table-cell office:value-type="float" office:value="76088.0">
            <text:p>76088</text:p>
          </table:table-cell>
          <table:table-cell office:value-type="float" office:value="-220.0">
            <text:p>-220</text:p>
          </table:table-cell>
          <table:table-cell office:value-type="float" office:value="-14858.0">
            <text:p>-14858</text:p>
          </table:table-cell>
          <table:table-cell office:value-type="float" office:value="-5507.0">
            <text:p>-5507</text:p>
          </table:table-cell>
          <table:table-cell office:value-type="float" office:value="-2966.0">
            <text:p>-2966</text:p>
          </table:table-cell>
          <table:table-cell office:value-type="float" office:value="4162.0">
            <text:p>4162</text:p>
          </table:table-cell>
          <table:table-cell office:value-type="float" office:value="38612.0">
            <text:p>38612</text:p>
          </table:table-cell>
          <table:table-cell office:value-type="float" office:value="-1483.0">
            <text:p>-1483</text:p>
          </table:table-cell>
          <table:table-cell office:value-type="float" office:value="-110509.0">
            <text:p>-110509</text:p>
          </table:table-cell>
          <table:table-cell office:value-type="float" office:value="417.0">
            <text:p>417</text:p>
          </table:table-cell>
          <table:table-cell office:value-type="float" office:value="-76617.0">
            <text:p>-76617</text:p>
          </table:table-cell>
          <table:table-cell office:value-type="float" office:value="-58264.0">
            <text:p>-58264</text:p>
          </table:table-cell>
          <table:table-cell office:value-type="float" office:value="148514.0">
            <text:p>148514</text:p>
          </table:table-cell>
        </table:table-row>
        <table:table-row>
          <table:table-cell office:value-type="string" office:string-value="2026/07/23">
            <text:p>2026/07/23</text:p>
          </table:table-cell>
          <table:table-cell office:value-type="float" office:value="1067.0">
            <text:p>1067</text:p>
          </table:table-cell>
          <table:table-cell office:value-type="float" office:value="37392.0">
            <text:p>37392</text:p>
          </table:table-cell>
          <table:table-cell office:value-type="float" office:value="-630.0">
            <text:p>-630</text:p>
          </table:table-cell>
          <table:table-cell office:value-type="float" office:value="-41515.0">
            <text:p>-41515</text:p>
          </table:table-cell>
          <table:table-cell office:value-type="float" office:value="539.0">
            <text:p>539</text:p>
          </table:table-cell>
          <table:table-cell office:value-type="float" office:value="16247.0">
            <text:p>16247</text:p>
          </table:table-cell>
          <table:table-cell office:value-type="float" office:value="5229.0">
            <text:p>5229</text:p>
          </table:table-cell>
          <table:table-cell office:value-type="float" office:value="67649.0">
            <text:p>67649</text:p>
          </table:table-cell>
          <table:table-cell office:value-type="float" office:value="-2113.0">
            <text:p>-2113</text:p>
          </table:table-cell>
          <table:table-cell office:value-type="float" office:value="-164182.0">
            <text:p>-164182</text:p>
          </table:table-cell>
          <table:table-cell office:value-type="float" office:value="956.0">
            <text:p>956</text:p>
          </table:table-cell>
          <table:table-cell office:value-type="float" office:value="-63318.0">
            <text:p>-63318</text:p>
          </table:table-cell>
          <table:table-cell office:value-type="float" office:value="-12124.0">
            <text:p>-12124</text:p>
          </table:table-cell>
          <table:table-cell office:value-type="float" office:value="159851.0">
            <text:p>159851</text:p>
          </table:table-cell>
        </table:table-row>
        <table:table-row>
          <table:table-cell office:value-type="string" office:string-value="2026/07/24">
            <text:p>2026/07/24</text:p>
          </table:table-cell>
          <table:table-cell office:value-type="float" office:value="-17812.0">
            <text:p>-17812</text:p>
          </table:table-cell>
          <table:table-cell office:value-type="float" office:value="40974.0">
            <text:p>40974</text:p>
          </table:table-cell>
          <table:table-cell office:value-type="float" office:value="-1030.0">
            <text:p>-1030</text:p>
          </table:table-cell>
          <table:table-cell office:value-type="float" office:value="-90564.0">
            <text:p>-90564</text:p>
          </table:table-cell>
          <table:table-cell office:value-type="float" office:value="-130.0">
            <text:p>-130</text:p>
          </table:table-cell>
          <table:table-cell office:value-type="float" office:value="-18002.0">
            <text:p>-18002</text:p>
          </table:table-cell>
          <table:table-cell office:value-type="float" office:value="4119.0">
            <text:p>4119</text:p>
          </table:table-cell>
          <table:table-cell office:value-type="float" office:value="71738.0">
            <text:p>71738</text:p>
          </table:table-cell>
          <table:table-cell office:value-type="float" office:value="-2113.0">
            <text:p>-2113</text:p>
          </table:table-cell>
          <table:table-cell office:value-type="float" office:value="-119041.0">
            <text:p>-119041</text:p>
          </table:table-cell>
          <table:table-cell office:value-type="float" office:value="623.0">
            <text:p>623</text:p>
          </table:table-cell>
          <table:table-cell office:value-type="float" office:value="-70581.0">
            <text:p>-70581</text:p>
          </table:table-cell>
          <table:table-cell office:value-type="float" office:value="67592.0">
            <text:p>67592</text:p>
          </table:table-cell>
          <table:table-cell office:value-type="float" office:value="117884.0">
            <text:p>117884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13714.0">
            <text:p>-13714</text:p>
          </table:table-cell>
          <table:table-cell office:value-type="float" office:value="-54877.0">
            <text:p>-54877</text:p>
          </table:table-cell>
          <table:table-cell office:value-type="float" office:value="80.0">
            <text:p>80</text:p>
          </table:table-cell>
          <table:table-cell office:value-type="float" office:value="138.0">
            <text:p>138</text:p>
          </table:table-cell>
          <table:table-cell office:value-type="float" office:value="243.0">
            <text:p>243</text:p>
          </table:table-cell>
          <table:table-cell office:value-type="float" office:value="-9177.0">
            <text:p>-9177</text:p>
          </table:table-cell>
          <table:table-cell office:value-type="float" office:value="2194.0">
            <text:p>2194</text:p>
          </table:table-cell>
          <table:table-cell office:value-type="float" office:value="20251.0">
            <text:p>20251</text:p>
          </table:table-cell>
          <table:table-cell office:value-type="float" office:value="87.0">
            <text:p>87</text:p>
          </table:table-cell>
          <table:table-cell office:value-type="float" office:value="547.0">
            <text:p>547</text:p>
          </table:table-cell>
          <table:table-cell office:value-type="float" office:value="4775.0">
            <text:p>4775</text:p>
          </table:table-cell>
          <table:table-cell office:value-type="float" office:value="82015.0">
            <text:p>82015</text:p>
          </table:table-cell>
          <table:table-cell office:value-type="float" office:value="63916.0">
            <text:p>63916</text:p>
          </table:table-cell>
          <table:table-cell office:value-type="float" office:value="-102813.0">
            <text:p>-102813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5905.0">
            <text:p>5905</text:p>
          </table:table-cell>
          <table:table-cell office:value-type="float" office:value="31396.0">
            <text:p>313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5.0">
            <text:p>805</text:p>
          </table:table-cell>
          <table:table-cell office:value-type="float" office:value="10353.0">
            <text:p>10353</text:p>
          </table:table-cell>
          <table:table-cell office:value-type="float" office:value="8099.0">
            <text:p>8099</text:p>
          </table:table-cell>
          <table:table-cell office:value-type="float" office:value="49093.0">
            <text:p>49093</text:p>
          </table:table-cell>
          <table:table-cell office:value-type="float" office:value="87.0">
            <text:p>87</text:p>
          </table:table-cell>
          <table:table-cell office:value-type="float" office:value="527.0">
            <text:p>527</text:p>
          </table:table-cell>
          <table:table-cell office:value-type="float" office:value="5580.0">
            <text:p>5580</text:p>
          </table:table-cell>
          <table:table-cell office:value-type="float" office:value="92619.0">
            <text:p>92619</text:p>
          </table:table-cell>
          <table:table-cell office:value-type="float" office:value="-41749.0">
            <text:p>-41749</text:p>
          </table:table-cell>
          <table:table-cell office:value-type="float" office:value="-142239.0">
            <text:p>-142239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10976.0">
            <text:p>-10976</text:p>
          </table:table-cell>
          <table:table-cell office:value-type="float" office:value="-10434.0">
            <text:p>-10434</text:p>
          </table:table-cell>
          <table:table-cell office:value-type="float" office:value="100.0">
            <text:p>100</text:p>
          </table:table-cell>
          <table:table-cell office:value-type="float" office:value="41.0">
            <text:p>41</text:p>
          </table:table-cell>
          <table:table-cell office:value-type="float" office:value="-2032.0">
            <text:p>-2032</text:p>
          </table:table-cell>
          <table:table-cell office:value-type="float" office:value="-9828.0">
            <text:p>-9828</text:p>
          </table:table-cell>
          <table:table-cell office:value-type="float" office:value="2714.0">
            <text:p>2714</text:p>
          </table:table-cell>
          <table:table-cell office:value-type="float" office:value="26264.0">
            <text:p>26264</text:p>
          </table:table-cell>
          <table:table-cell office:value-type="float" office:value="87.0">
            <text:p>87</text:p>
          </table:table-cell>
          <table:table-cell office:value-type="float" office:value="384.0">
            <text:p>384</text:p>
          </table:table-cell>
          <table:table-cell office:value-type="float" office:value="6123.0">
            <text:p>6123</text:p>
          </table:table-cell>
          <table:table-cell office:value-type="float" office:value="86773.0">
            <text:p>86773</text:p>
          </table:table-cell>
          <table:table-cell office:value-type="float" office:value="20221.0">
            <text:p>20221</text:p>
          </table:table-cell>
          <table:table-cell office:value-type="float" office:value="-113421.0">
            <text:p>-113421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485.0">
            <text:p>2485</text:p>
          </table:table-cell>
          <table:table-cell office:value-type="float" office:value="-32205.0">
            <text:p>-3220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2.0">
            <text:p>1532</text:p>
          </table:table-cell>
          <table:table-cell office:value-type="float" office:value="21680.0">
            <text:p>21680</text:p>
          </table:table-cell>
          <table:table-cell office:value-type="float" office:value="7127.0">
            <text:p>7127</text:p>
          </table:table-cell>
          <table:table-cell office:value-type="float" office:value="26871.0">
            <text:p>26871</text:p>
          </table:table-cell>
          <table:table-cell office:value-type="float" office:value="87.0">
            <text:p>87</text:p>
          </table:table-cell>
          <table:table-cell office:value-type="float" office:value="299.0">
            <text:p>299</text:p>
          </table:table-cell>
          <table:table-cell office:value-type="float" office:value="7720.0">
            <text:p>7720</text:p>
          </table:table-cell>
          <table:table-cell office:value-type="float" office:value="101103.0">
            <text:p>101103</text:p>
          </table:table-cell>
          <table:table-cell office:value-type="float" office:value="10525.0">
            <text:p>10525</text:p>
          </table:table-cell>
          <table:table-cell office:value-type="float" office:value="-128273.0">
            <text:p>-12827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2291.0">
            <text:p>-2291</text:p>
          </table:table-cell>
          <table:table-cell office:value-type="float" office:value="-23184.0">
            <text:p>-2318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73.0">
            <text:p>2473</text:p>
          </table:table-cell>
          <table:table-cell office:value-type="float" office:value="23576.0">
            <text:p>23576</text:p>
          </table:table-cell>
          <table:table-cell office:value-type="float" office:value="4836.0">
            <text:p>4836</text:p>
          </table:table-cell>
          <table:table-cell office:value-type="float" office:value="3652.0">
            <text:p>3652</text:p>
          </table:table-cell>
          <table:table-cell office:value-type="float" office:value="87.0">
            <text:p>87</text:p>
          </table:table-cell>
          <table:table-cell office:value-type="float" office:value="562.0">
            <text:p>562</text:p>
          </table:table-cell>
          <table:table-cell office:value-type="float" office:value="10193.0">
            <text:p>10193</text:p>
          </table:table-cell>
          <table:table-cell office:value-type="float" office:value="165920.0">
            <text:p>165920</text:p>
          </table:table-cell>
          <table:table-cell office:value-type="float" office:value="-392.0">
            <text:p>-392</text:p>
          </table:table-cell>
          <table:table-cell office:value-type="float" office:value="-170134.0">
            <text:p>-170134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464.0">
            <text:p>-1464</text:p>
          </table:table-cell>
          <table:table-cell office:value-type="float" office:value="-3474.0">
            <text:p>-3474</text:p>
          </table:table-cell>
          <table:table-cell office:value-type="float" office:value="80.0">
            <text:p>80</text:p>
          </table:table-cell>
          <table:table-cell office:value-type="float" office:value="278.0">
            <text:p>278</text:p>
          </table:table-cell>
          <table:table-cell office:value-type="float" office:value="-1967.0">
            <text:p>-1967</text:p>
          </table:table-cell>
          <table:table-cell office:value-type="float" office:value="-8523.0">
            <text:p>-8523</text:p>
          </table:table-cell>
          <table:table-cell office:value-type="float" office:value="5300.0">
            <text:p>5300</text:p>
          </table:table-cell>
          <table:table-cell office:value-type="float" office:value="-37571.0">
            <text:p>-37571</text:p>
          </table:table-cell>
          <table:table-cell office:value-type="float" office:value="87.0">
            <text:p>87</text:p>
          </table:table-cell>
          <table:table-cell office:value-type="float" office:value="432.0">
            <text:p>432</text:p>
          </table:table-cell>
          <table:table-cell office:value-type="float" office:value="6836.0">
            <text:p>6836</text:p>
          </table:table-cell>
          <table:table-cell office:value-type="float" office:value="132434.0">
            <text:p>132434</text:p>
          </table:table-cell>
          <table:table-cell office:value-type="float" office:value="11719.0">
            <text:p>11719</text:p>
          </table:table-cell>
          <table:table-cell office:value-type="float" office:value="-95295.0">
            <text:p>-95295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714.0">
            <text:p>2714</text:p>
          </table:table-cell>
          <table:table-cell office:value-type="float" office:value="-10139.0">
            <text:p>-10139</text:p>
          </table:table-cell>
          <table:table-cell office:value-type="float" office:value="120.0">
            <text:p>120</text:p>
          </table:table-cell>
          <table:table-cell office:value-type="float" office:value="587.0">
            <text:p>587</text:p>
          </table:table-cell>
          <table:table-cell office:value-type="float" office:value="2892.0">
            <text:p>2892</text:p>
          </table:table-cell>
          <table:table-cell office:value-type="float" office:value="10340.0">
            <text:p>10340</text:p>
          </table:table-cell>
          <table:table-cell office:value-type="float" office:value="8014.0">
            <text:p>8014</text:p>
          </table:table-cell>
          <table:table-cell office:value-type="float" office:value="-31429.0">
            <text:p>-31429</text:p>
          </table:table-cell>
          <table:table-cell office:value-type="float" office:value="207.0">
            <text:p>207</text:p>
          </table:table-cell>
          <table:table-cell office:value-type="float" office:value="846.0">
            <text:p>846</text:p>
          </table:table-cell>
          <table:table-cell office:value-type="float" office:value="9728.0">
            <text:p>9728</text:p>
          </table:table-cell>
          <table:table-cell office:value-type="float" office:value="134438.0">
            <text:p>134438</text:p>
          </table:table-cell>
          <table:table-cell office:value-type="float" office:value="-788.0">
            <text:p>-788</text:p>
          </table:table-cell>
          <table:table-cell office:value-type="float" office:value="-103855.0">
            <text:p>-103855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5261.0">
            <text:p>-5261</text:p>
          </table:table-cell>
          <table:table-cell office:value-type="float" office:value="-23783.0">
            <text:p>-237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44.0">
            <text:p>2044</text:p>
          </table:table-cell>
          <table:table-cell office:value-type="float" office:value="4865.0">
            <text:p>4865</text:p>
          </table:table-cell>
          <table:table-cell office:value-type="float" office:value="275.0">
            <text:p>275</text:p>
          </table:table-cell>
          <table:table-cell office:value-type="float" office:value="-46671.0">
            <text:p>-46671</text:p>
          </table:table-cell>
          <table:table-cell office:value-type="float" office:value="87.0">
            <text:p>87</text:p>
          </table:table-cell>
          <table:table-cell office:value-type="float" office:value="116.0">
            <text:p>116</text:p>
          </table:table-cell>
          <table:table-cell office:value-type="float" office:value="9703.0">
            <text:p>9703</text:p>
          </table:table-cell>
          <table:table-cell office:value-type="float" office:value="107022.0">
            <text:p>107022</text:p>
          </table:table-cell>
          <table:table-cell office:value-type="float" office:value="18918.0">
            <text:p>18918</text:p>
          </table:table-cell>
          <table:table-cell office:value-type="float" office:value="-60467.0">
            <text:p>-60467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6806.0">
            <text:p>6806</text:p>
          </table:table-cell>
          <table:table-cell office:value-type="float" office:value="113678.0">
            <text:p>113678</text:p>
          </table:table-cell>
          <table:table-cell office:value-type="float" office:value="78.0">
            <text:p>78</text:p>
          </table:table-cell>
          <table:table-cell office:value-type="float" office:value="747.0">
            <text:p>747</text:p>
          </table:table-cell>
          <table:table-cell office:value-type="float" office:value="3498.0">
            <text:p>3498</text:p>
          </table:table-cell>
          <table:table-cell office:value-type="float" office:value="3594.0">
            <text:p>3594</text:p>
          </table:table-cell>
          <table:table-cell office:value-type="float" office:value="7081.0">
            <text:p>7081</text:p>
          </table:table-cell>
          <table:table-cell office:value-type="float" office:value="16906.0">
            <text:p>16906</text:p>
          </table:table-cell>
          <table:table-cell office:value-type="float" office:value="165.0">
            <text:p>165</text:p>
          </table:table-cell>
          <table:table-cell office:value-type="float" office:value="577.0">
            <text:p>577</text:p>
          </table:table-cell>
          <table:table-cell office:value-type="float" office:value="13201.0">
            <text:p>13201</text:p>
          </table:table-cell>
          <table:table-cell office:value-type="float" office:value="129029.0">
            <text:p>129029</text:p>
          </table:table-cell>
          <table:table-cell office:value-type="float" office:value="-118019.0">
            <text:p>-118019</text:p>
          </table:table-cell>
          <table:table-cell office:value-type="float" office:value="-146512.0">
            <text:p>-146512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14930.0">
            <text:p>-14930</text:p>
          </table:table-cell>
          <table:table-cell office:value-type="float" office:value="-5598.0">
            <text:p>-5598</text:p>
          </table:table-cell>
          <table:table-cell office:value-type="float" office:value="6.0">
            <text:p>6</text:p>
          </table:table-cell>
          <table:table-cell office:value-type="float" office:value="411.0">
            <text:p>411</text:p>
          </table:table-cell>
          <table:table-cell office:value-type="float" office:value="-4601.0">
            <text:p>-4601</text:p>
          </table:table-cell>
          <table:table-cell office:value-type="float" office:value="-40900.0">
            <text:p>-40900</text:p>
          </table:table-cell>
          <table:table-cell office:value-type="float" office:value="4992.0">
            <text:p>4992</text:p>
          </table:table-cell>
          <table:table-cell office:value-type="float" office:value="2612.0">
            <text:p>2612</text:p>
          </table:table-cell>
          <table:table-cell office:value-type="float" office:value="6.0">
            <text:p>6</text:p>
          </table:table-cell>
          <table:table-cell office:value-type="float" office:value="366.0">
            <text:p>366</text:p>
          </table:table-cell>
          <table:table-cell office:value-type="float" office:value="3139.0">
            <text:p>3139</text:p>
          </table:table-cell>
          <table:table-cell office:value-type="float" office:value="70673.0">
            <text:p>70673</text:p>
          </table:table-cell>
          <table:table-cell office:value-type="float" office:value="46087.0">
            <text:p>46087</text:p>
          </table:table-cell>
          <table:table-cell office:value-type="float" office:value="-73651.0">
            <text:p>-7365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4454.0">
            <text:p>4454</text:p>
          </table:table-cell>
          <table:table-cell office:value-type="float" office:value="15664.0">
            <text:p>15664</text:p>
          </table:table-cell>
          <table:table-cell office:value-type="float" office:value="100.0">
            <text:p>100</text:p>
          </table:table-cell>
          <table:table-cell office:value-type="float" office:value="87.0">
            <text:p>87</text:p>
          </table:table-cell>
          <table:table-cell office:value-type="float" office:value="1947.0">
            <text:p>1947</text:p>
          </table:table-cell>
          <table:table-cell office:value-type="float" office:value="-8323.0">
            <text:p>-8323</text:p>
          </table:table-cell>
          <table:table-cell office:value-type="float" office:value="9446.0">
            <text:p>9446</text:p>
          </table:table-cell>
          <table:table-cell office:value-type="float" office:value="24007.0">
            <text:p>24007</text:p>
          </table:table-cell>
          <table:table-cell office:value-type="float" office:value="106.0">
            <text:p>106</text:p>
          </table:table-cell>
          <table:table-cell office:value-type="float" office:value="443.0">
            <text:p>443</text:p>
          </table:table-cell>
          <table:table-cell office:value-type="float" office:value="5086.0">
            <text:p>5086</text:p>
          </table:table-cell>
          <table:table-cell office:value-type="float" office:value="66597.0">
            <text:p>66597</text:p>
          </table:table-cell>
          <table:table-cell office:value-type="float" office:value="-7428.0">
            <text:p>-7428</text:p>
          </table:table-cell>
          <table:table-cell office:value-type="float" office:value="-91047.0">
            <text:p>-91047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646.0">
            <text:p>646</text:p>
          </table:table-cell>
          <table:table-cell office:value-type="float" office:value="194016.0">
            <text:p>194016</text:p>
          </table:table-cell>
          <table:table-cell office:value-type="float" office:value="118.0">
            <text:p>118</text:p>
          </table:table-cell>
          <table:table-cell office:value-type="float" office:value="1515.0">
            <text:p>1515</text:p>
          </table:table-cell>
          <table:table-cell office:value-type="float" office:value="1379.0">
            <text:p>1379</text:p>
          </table:table-cell>
          <table:table-cell office:value-type="float" office:value="72375.0">
            <text:p>72375</text:p>
          </table:table-cell>
          <table:table-cell office:value-type="float" office:value="7416.0">
            <text:p>7416</text:p>
          </table:table-cell>
          <table:table-cell office:value-type="float" office:value="353671.0">
            <text:p>353671</text:p>
          </table:table-cell>
          <table:table-cell office:value-type="float" office:value="124.0">
            <text:p>124</text:p>
          </table:table-cell>
          <table:table-cell office:value-type="float" office:value="5135.0">
            <text:p>5135</text:p>
          </table:table-cell>
          <table:table-cell office:value-type="float" office:value="3341.0">
            <text:p>3341</text:p>
          </table:table-cell>
          <table:table-cell office:value-type="float" office:value="166555.0">
            <text:p>166555</text:p>
          </table:table-cell>
          <table:table-cell office:value-type="float" office:value="-267906.0">
            <text:p>-267906</text:p>
          </table:table-cell>
          <table:table-cell office:value-type="float" office:value="-525361.0">
            <text:p>-525361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2427.0">
            <text:p>2427</text:p>
          </table:table-cell>
          <table:table-cell office:value-type="float" office:value="35900.0">
            <text:p>35900</text:p>
          </table:table-cell>
          <table:table-cell office:value-type="float" office:value="5.0">
            <text:p>5</text:p>
          </table:table-cell>
          <table:table-cell office:value-type="float" office:value="396.0">
            <text:p>396</text:p>
          </table:table-cell>
          <table:table-cell office:value-type="float" office:value="-33.0">
            <text:p>-33</text:p>
          </table:table-cell>
          <table:table-cell office:value-type="float" office:value="-279.0">
            <text:p>-279</text:p>
          </table:table-cell>
          <table:table-cell office:value-type="float" office:value="9843.0">
            <text:p>9843</text:p>
          </table:table-cell>
          <table:table-cell office:value-type="float" office:value="361526.0">
            <text:p>361526</text:p>
          </table:table-cell>
          <table:table-cell office:value-type="float" office:value="129.0">
            <text:p>129</text:p>
          </table:table-cell>
          <table:table-cell office:value-type="float" office:value="4487.0">
            <text:p>4487</text:p>
          </table:table-cell>
          <table:table-cell office:value-type="float" office:value="3308.0">
            <text:p>3308</text:p>
          </table:table-cell>
          <table:table-cell office:value-type="float" office:value="167267.0">
            <text:p>167267</text:p>
          </table:table-cell>
          <table:table-cell office:value-type="float" office:value="-36017.0">
            <text:p>-36017</text:p>
          </table:table-cell>
          <table:table-cell office:value-type="float" office:value="-533280.0">
            <text:p>-533280</text:p>
          </table:table-cell>
        </table:table-row>
        <table:table-row>
          <table:table-cell office:value-type="string" office:string-value="2026/07/21">
            <text:p>2026/07/21</text:p>
          </table:table-cell>
          <table:table-cell office:value-type="float" office:value="-4893.0">
            <text:p>-4893</text:p>
          </table:table-cell>
          <table:table-cell office:value-type="float" office:value="-81727.0">
            <text:p>-8172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62.0">
            <text:p>3462</text:p>
          </table:table-cell>
          <table:table-cell office:value-type="float" office:value="-3686.0">
            <text:p>-3686</text:p>
          </table:table-cell>
          <table:table-cell office:value-type="float" office:value="4950.0">
            <text:p>4950</text:p>
          </table:table-cell>
          <table:table-cell office:value-type="float" office:value="115726.0">
            <text:p>115726</text:p>
          </table:table-cell>
          <table:table-cell office:value-type="float" office:value="129.0">
            <text:p>129</text:p>
          </table:table-cell>
          <table:table-cell office:value-type="float" office:value="762.0">
            <text:p>762</text:p>
          </table:table-cell>
          <table:table-cell office:value-type="float" office:value="6770.0">
            <text:p>6770</text:p>
          </table:table-cell>
          <table:table-cell office:value-type="float" office:value="107148.0">
            <text:p>107148</text:p>
          </table:table-cell>
          <table:table-cell office:value-type="float" office:value="85413.0">
            <text:p>85413</text:p>
          </table:table-cell>
          <table:table-cell office:value-type="float" office:value="-223636.0">
            <text:p>-223636</text:p>
          </table:table-cell>
        </table:table-row>
        <table:table-row>
          <table:table-cell office:value-type="string" office:string-value="2026/07/22">
            <text:p>2026/07/22</text:p>
          </table:table-cell>
          <table:table-cell office:value-type="float" office:value="-19950.0">
            <text:p>-19950</text:p>
          </table:table-cell>
          <table:table-cell office:value-type="float" office:value="-25633.0">
            <text:p>-256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9.0">
            <text:p>299</text:p>
          </table:table-cell>
          <table:table-cell office:value-type="float" office:value="-21516.0">
            <text:p>-21516</text:p>
          </table:table-cell>
          <table:table-cell office:value-type="float" office:value="4069.0">
            <text:p>4069</text:p>
          </table:table-cell>
          <table:table-cell office:value-type="float" office:value="84108.0">
            <text:p>84108</text:p>
          </table:table-cell>
          <table:table-cell office:value-type="float" office:value="9.0">
            <text:p>9</text:p>
          </table:table-cell>
          <table:table-cell office:value-type="float" office:value="546.0">
            <text:p>546</text:p>
          </table:table-cell>
          <table:table-cell office:value-type="float" office:value="2735.0">
            <text:p>2735</text:p>
          </table:table-cell>
          <table:table-cell office:value-type="float" office:value="89409.0">
            <text:p>89409</text:p>
          </table:table-cell>
          <table:table-cell office:value-type="float" office:value="47149.0">
            <text:p>47149</text:p>
          </table:table-cell>
          <table:table-cell office:value-type="float" office:value="-174063.0">
            <text:p>-174063</text:p>
          </table:table-cell>
        </table:table-row>
        <table:table-row>
          <table:table-cell office:value-type="string" office:string-value="2026/07/23">
            <text:p>2026/07/23</text:p>
          </table:table-cell>
          <table:table-cell office:value-type="float" office:value="615.0">
            <text:p>615</text:p>
          </table:table-cell>
          <table:table-cell office:value-type="float" office:value="-22527.0">
            <text:p>-2252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4.0">
            <text:p>1324</text:p>
          </table:table-cell>
          <table:table-cell office:value-type="float" office:value="8415.0">
            <text:p>8415</text:p>
          </table:table-cell>
          <table:table-cell office:value-type="float" office:value="4684.0">
            <text:p>4684</text:p>
          </table:table-cell>
          <table:table-cell office:value-type="float" office:value="71990.0">
            <text:p>71990</text:p>
          </table:table-cell>
          <table:table-cell office:value-type="float" office:value="9.0">
            <text:p>9</text:p>
          </table:table-cell>
          <table:table-cell office:value-type="float" office:value="486.0">
            <text:p>486</text:p>
          </table:table-cell>
          <table:table-cell office:value-type="float" office:value="4059.0">
            <text:p>4059</text:p>
          </table:table-cell>
          <table:table-cell office:value-type="float" office:value="91650.0">
            <text:p>91650</text:p>
          </table:table-cell>
          <table:table-cell office:value-type="float" office:value="14112.0">
            <text:p>14112</text:p>
          </table:table-cell>
          <table:table-cell office:value-type="float" office:value="-164126.0">
            <text:p>-164126</text:p>
          </table:table-cell>
        </table:table-row>
        <table:table-row>
          <table:table-cell office:value-type="string" office:string-value="2026/07/24">
            <text:p>2026/07/24</text:p>
          </table:table-cell>
          <table:table-cell office:value-type="float" office:value="-7236.0">
            <text:p>-7236</text:p>
          </table:table-cell>
          <table:table-cell office:value-type="float" office:value="-44287.0">
            <text:p>-44287</text:p>
          </table:table-cell>
          <table:table-cell office:value-type="float" office:value="160.0">
            <text:p>160</text:p>
          </table:table-cell>
          <table:table-cell office:value-type="float" office:value="114.0">
            <text:p>114</text:p>
          </table:table-cell>
          <table:table-cell office:value-type="float" office:value="662.0">
            <text:p>662</text:p>
          </table:table-cell>
          <table:table-cell office:value-type="float" office:value="-11193.0">
            <text:p>-11193</text:p>
          </table:table-cell>
          <table:table-cell office:value-type="float" office:value="3429.0">
            <text:p>3429</text:p>
          </table:table-cell>
          <table:table-cell office:value-type="float" office:value="38980.0">
            <text:p>38980</text:p>
          </table:table-cell>
          <table:table-cell office:value-type="float" office:value="9.0">
            <text:p>9</text:p>
          </table:table-cell>
          <table:table-cell office:value-type="float" office:value="710.0">
            <text:p>710</text:p>
          </table:table-cell>
          <table:table-cell office:value-type="float" office:value="2976.0">
            <text:p>2976</text:p>
          </table:table-cell>
          <table:table-cell office:value-type="float" office:value="84047.0">
            <text:p>84047</text:p>
          </table:table-cell>
          <table:table-cell office:value-type="float" office:value="55366.0">
            <text:p>55366</text:p>
          </table:table-cell>
          <table:table-cell office:value-type="float" office:value="-123737.0">
            <text:p>-123737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1592.0">
            <text:p>1592</text:p>
          </table:table-cell>
          <table:table-cell office:value-type="float" office:value="15070428.0">
            <text:p>15070428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3683.0">
            <text:p>3683</text:p>
          </table:table-cell>
          <table:table-cell office:value-type="float" office:value="34363431.0">
            <text:p>34363431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3071.0">
            <text:p>3071</text:p>
          </table:table-cell>
          <table:table-cell office:value-type="float" office:value="28899737.0">
            <text:p>28899737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670.0">
            <text:p>2670</text:p>
          </table:table-cell>
          <table:table-cell office:value-type="float" office:value="25075033.0">
            <text:p>2507503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3793.0">
            <text:p>3793</text:p>
          </table:table-cell>
          <table:table-cell office:value-type="float" office:value="34733609.0">
            <text:p>34733609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3311.0">
            <text:p>3311</text:p>
          </table:table-cell>
          <table:table-cell office:value-type="float" office:value="30234903.0">
            <text:p>30234903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243.0">
            <text:p>2243</text:p>
          </table:table-cell>
          <table:table-cell office:value-type="float" office:value="20526530.0">
            <text:p>20526530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1270.0">
            <text:p>1270</text:p>
          </table:table-cell>
          <table:table-cell office:value-type="float" office:value="11538103.0">
            <text:p>11538103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2352.0">
            <text:p>2352</text:p>
          </table:table-cell>
          <table:table-cell office:value-type="float" office:value="21112288.0">
            <text:p>21112288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664.0">
            <text:p>-664</text:p>
          </table:table-cell>
          <table:table-cell office:value-type="float" office:value="-6103921.0">
            <text:p>-610392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657.0">
            <text:p>657</text:p>
          </table:table-cell>
          <table:table-cell office:value-type="float" office:value="6026859.0">
            <text:p>6026859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4666.0">
            <text:p>4666</text:p>
          </table:table-cell>
          <table:table-cell office:value-type="float" office:value="39787584.0">
            <text:p>39787584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2974.0">
            <text:p>2974</text:p>
          </table:table-cell>
          <table:table-cell office:value-type="float" office:value="25409213.0">
            <text:p>25409213</text:p>
          </table:table-cell>
        </table:table-row>
        <table:table-row>
          <table:table-cell office:value-type="string" office:string-value="2026/07/21">
            <text:p>2026/07/21</text:p>
          </table:table-cell>
          <table:table-cell office:value-type="float" office:value="1203.0">
            <text:p>1203</text:p>
          </table:table-cell>
          <table:table-cell office:value-type="float" office:value="10717869.0">
            <text:p>10717869</text:p>
          </table:table-cell>
        </table:table-row>
        <table:table-row>
          <table:table-cell office:value-type="string" office:string-value="2026/07/22">
            <text:p>2026/07/22</text:p>
          </table:table-cell>
          <table:table-cell office:value-type="float" office:value="1139.0">
            <text:p>1139</text:p>
          </table:table-cell>
          <table:table-cell office:value-type="float" office:value="10208144.0">
            <text:p>10208144</text:p>
          </table:table-cell>
        </table:table-row>
        <table:table-row>
          <table:table-cell office:value-type="string" office:string-value="2026/07/23">
            <text:p>2026/07/23</text:p>
          </table:table-cell>
          <table:table-cell office:value-type="float" office:value="739.0">
            <text:p>739</text:p>
          </table:table-cell>
          <table:table-cell office:value-type="float" office:value="6677060.0">
            <text:p>6677060</text:p>
          </table:table-cell>
        </table:table-row>
        <table:table-row>
          <table:table-cell office:value-type="string" office:string-value="2026/07/24">
            <text:p>2026/07/24</text:p>
          </table:table-cell>
          <table:table-cell office:value-type="float" office:value="2258.0">
            <text:p>2258</text:p>
          </table:table-cell>
          <table:table-cell office:value-type="float" office:value="19817976.0">
            <text:p>19817976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